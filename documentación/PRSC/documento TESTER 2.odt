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12pt" fo:language="es" fo:country="ES" officeooo:rsid="00178eff" officeooo:paragraph-rsid="001ab871" style:font-size-asian="12pt" style:font-size-complex="12pt"/>
    </style:style>
    <style:style style:name="P2" style:family="paragraph" style:parent-style-name="Text_20_body">
      <style:text-properties style:font-name="Arial" fo:font-size="12pt" fo:language="es" fo:country="ES" fo:font-weight="normal" officeooo:rsid="00178eff" officeooo:paragraph-rsid="001c3ef4" style:font-size-asian="10.5pt" style:font-weight-asian="normal" style:font-size-complex="12pt" style:font-weight-complex="normal"/>
    </style:style>
    <style:style style:name="T1" style:family="text">
      <style:text-properties officeooo:rsid="001ab8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ESTING</text:span></text:span></text:p>
      <text:p text:style-name="P2"><text:line-break/>Caso de Prueba N° 1<text:line-break/>ID: CP-001<text:line-break/>Título: Visualización de cotizaciones en la página principal<text:line-break/>Precondiciones:<text:line-break/> <text:s text:c="3"/>• El usuario se encuentra en la página principal de Dolarito (ruta /).<text:line-break/> <text:s text:c="3"/>• El servidor se encuentra operativo.<text:line-break/> <text:s text:c="3"/>• Existe conexión a Internet.<text:line-break/>Pasos a reproducir:<text:line-break/> <text:s text:c="3"/>1. Ingresar a la página principal de Dolarito.<text:line-break/> <text:s text:c="3"/>2. Esperar la carga completa del sitio.<text:line-break/>Resultado esperado:<text:line-break/> <text:s text:c="3"/>• Se muestran las cotizaciones: Oficial, Blue, MEP, CCL, Tarjeta, Mayorista.<text:line-break/> <text:s text:c="3"/>• Los valores son visibles y legibles.<text:line-break/>Prioridad: Alta<text:line-break/><text:line-break/>Caso de Prueba N° 2<text:line-break/>ID: CP-002<text:line-break/>Título: Actualización automática de cotizaciones<text:line-break/>Precondiciones:<text:line-break/> <text:s text:c="3"/>• El usuario se encuentra en la página principal de Dolarito (ruta /).<text:line-break/> <text:s text:c="3"/>• Cotizaciones cargadas correctamente.<text:line-break/>Pasos a reproducir:<text:line-break/> <text:s text:c="3"/>1. Registrar el valor actual de una cotización (ej. Blue).<text:line-break/> <text:s text:c="3"/>2. Esperar 60 segundos.<text:line-break/> <text:s text:c="3"/>3. Verificar nuevamente el valor de la misma cotización.<text:line-break/>Resultado esperado:<text:line-break/> <text:s text:c="3"/>• La información se actualiza automáticamente sin recargar la página.<text:line-break/>Prioridad: Alta<text:line-break/><text:line-break/>Caso de Prueba N° 3<text:line-break/>ID: CP-003<text:line-break/>Título: Funcionamiento de calculadora de conversión<text:line-break/>Precondiciones:<text:line-break/> <text:s text:c="3"/>• El usuario se encuentra en la página principal de Dolarito (ruta /).<text:line-break/> <text:s text:c="3"/>• Cotizaciones cargadas.<text:line-break/>Pasos a reproducir:<text:line-break/> <text:s text:c="3"/>1. Ingresar $100.000 ARS.<text:line-break/> <text:s text:c="3"/>2. Seleccionar conversión a USD Blue.<text:line-break/> <text:s text:c="3"/>3. Ejecutar cálculo.<text:line-break/>Resultado esperado:<text:line-break/> <text:s text:c="3"/>• El resultado coincide con la cotización mostrada.<text:line-break/> <text:s text:c="3"/>• Se respetan los decimales correspondientes.<text:line-break/>Prioridad: Alta<text:line-break/><text:soft-page-break/><text:line-break/>Caso de Prueba N° 4<text:line-break/>ID: CP-004<text:line-break/>Título: Validación de ingreso de letras en la calculadora<text:line-break/>Precondiciones:<text:line-break/> <text:s text:c="3"/>• El usuario se encuentra en la página principal de Dolarito (ruta /).<text:line-break/> <text:s text:c="3"/>• Calculadora disponible.<text:line-break/>Pasos a reproducir:<text:line-break/> <text:s text:c="3"/>1. Ingresar "abc" en el campo de monto.<text:line-break/> <text:s text:c="3"/>2. Presionar calcular.<text:line-break/>Resultado esperado:<text:line-break/> <text:s text:c="3"/>• El sistema rechaza el valor ingresado.<text:line-break/> <text:s text:c="3"/>• Se muestra un mensaje de error.<text:line-break/>Prioridad: Media<text:line-break/><text:line-break/>Caso de Prueba N° 5<text:line-break/>ID: CP-005<text:line-break/>Título: Conversión con valor cero<text:line-break/>Precondiciones:<text:line-break/> <text:s text:c="3"/>• El usuario se encuentra en la página principal de Dolarito (ruta /).<text:line-break/> <text:s text:c="3"/>• Calculadora disponible.<text:line-break/>Pasos a reproducir:<text:line-break/> <text:s text:c="3"/>1. Ingresar 0 en el campo de monto.<text:line-break/> <text:s text:c="3"/>2. Realizar la conversión.<text:line-break/>Resultado esperado:<text:line-break/> <text:s text:c="3"/>• El resultado obtenido es 0.<text:line-break/>Prioridad: Baja<text:line-break/><text:line-break/>Caso de Prueba N° 6<text:line-break/>ID: CP-006<text:line-break/>Título: Persistencia del modo oscuro<text:line-break/>Precondiciones:<text:line-break/> <text:s text:c="3"/>• Usuario ubicado en la página principal (ruta /).<text:line-break/>Pasos a reproducir:<text:line-break/> <text:s text:c="3"/>1. Activar el modo oscuro.<text:line-break/> <text:s text:c="3"/>2. Actualizar la página mediante F5.<text:line-break/>Resultado esperado:<text:line-break/> <text:s text:c="3"/>• El modo oscuro permanece activo luego de la actualización.<text:line-break/>Prioridad: Media<text:line-break/><text:line-break/>Caso de Prueba N° 7<text:line-break/>ID: CP-007<text:line-break/>Título: Visualización correcta en dispositivos móviles<text:line-break/>Precondiciones:<text:line-break/> <text:s text:c="3"/>• Acceso desde un teléfono móvil.<text:line-break/> <text:s text:c="3"/>• Usuario en la página principal de Dolarito (ruta /).<text:line-break/><text:soft-page-break/>Pasos a reproducir:<text:line-break/> <text:s text:c="3"/>1. Abrir Dolarito desde un celular.<text:line-break/> <text:s text:c="3"/>2. Navegar por las distintas secciones.<text:line-break/>Resultado esperado:<text:line-break/> <text:s text:c="3"/>• No existe desplazamiento horizontal.<text:line-break/> <text:s text:c="3"/>• Todos los elementos son visibles correctamente.<text:line-break/>Prioridad: Alta<text:line-break/><text:line-break/>Caso de Prueba N° 8<text:line-break/>ID: CP-008<text:line-break/>Título: Comportamiento ante caída de una API externa<text:line-break/>Precondiciones:<text:line-break/> <text:s text:c="3"/>• Usuario en la página principal de Dolarito (ruta /).<text:line-break/> <text:s text:c="3"/>• Simulación de indisponibilidad de la API de cotizaciones.<text:line-break/>Pasos a reproducir:<text:line-break/> <text:s text:c="3"/>1. Interrumpir la respuesta de la API.<text:line-break/> <text:s text:c="3"/>2. Solicitar la carga de cotizaciones.<text:line-break/>Resultado esperado:<text:line-break/> <text:s text:c="3"/>• El sistema muestra los últimos datos almacenados.<text:line-break/> <text:s text:c="3"/>• No se produce una caída de la aplicación.<text:line-break/>Prioridad: Crítica<text:line-break/><text:line-break/>Caso de Prueba N° 9<text:line-break/>ID: CP-009<text:line-break/>Título: Carga inicial bajo conexión lenta<text:line-break/>Precondiciones:<text:line-break/> <text:s text:c="3"/>• Usuario en la página principal de Dolarito (ruta /).<text:line-break/> <text:s text:c="3"/>• Emulación de red 3G lenta.<text:line-break/>Pasos a reproducir:<text:line-break/> <text:s text:c="3"/>1. Abrir la página principal.<text:line-break/> <text:s text:c="3"/>2. Observar el proceso de carga.<text:line-break/>Resultado esperado:<text:line-break/> <text:s text:c="3"/>• Se muestran skeletons o indicadores de carga.<text:line-break/> <text:s text:c="3"/>• La interfaz no aparece vacía.<text:line-break/>Prioridad: Media<text:line-break/><text:line-break/>Caso de Prueba N° 10<text:line-break/>ID: CP-010<text:line-break/>Título: Protección contra SQL Injection<text:line-break/>Precondiciones:<text:line-break/> <text:s text:c="3"/>• Usuario en la página de login (ruta /login).<text:line-break/> <text:s text:c="3"/>• Campo de entrada disponible.<text:line-break/>Pasos a reproducir:<text:line-break/> <text:s text:c="3"/>1. Ingresar ' OR 1=1 -- en el campo de correo electrónico.<text:line-break/> <text:s text:c="3"/>2. Ingresar cualquier contraseña.<text:line-break/> <text:s text:c="3"/>3. Presionar "Iniciar Sesión".<text:line-break/><text:soft-page-break/>Resultado esperado:<text:line-break/> <text:s text:c="3"/>• La entrada es rechazada.<text:line-break/> <text:s text:c="3"/>• No se altera la base de datos.<text:line-break/>Prioridad: Crítica<text:line-break/><text:line-break/>Caso de Prueba N° 11<text:line-break/>ID: CP-011<text:line-break/>Título: Verificación de tiempo de respuesta de la API<text:line-break/>Precondiciones:<text:line-break/> <text:s text:c="3"/>• Backend operativo.<text:line-break/> <text:s text:c="3"/>• Herramienta de desarrollo (Postman/curl/navegador) lista.<text:line-break/>Pasos a reproducir:<text:line-break/> <text:s text:c="3"/>1. Realizar una solicitud GET al endpoint /api/cotizaciones.<text:line-break/> <text:s text:c="3"/>2. Medir el tiempo de respuesta.<text:line-break/>Resultado esperado:<text:line-break/> <text:s text:c="3"/>• La respuesta se obtiene en menos de 500 ms.<text:line-break/>Prioridad: Alta<text:line-break/><text:line-break/>Caso de Prueba N° 12<text:line-break/>ID: CP-012<text:line-break/>Título: Navegación completa del usuario<text:line-break/>Precondiciones:<text:line-break/> <text:s text:c="3"/>• Sistema funcionando correctamente.<text:line-break/> <text:s text:c="3"/>• Usuario en la página principal (ruta /).<text:line-break/>Pasos a reproducir:<text:line-break/> <text:s text:c="3"/>1. Ingresar al sitio.<text:line-break/> <text:s text:c="3"/>2. Consultar cotizaciones.<text:line-break/> <text:s text:c="3"/>3. Utilizar la calculadora.<text:line-break/> <text:s text:c="3"/>4. Activar modo oscuro.<text:line-break/> <text:s text:c="3"/>5. Actualizar la página.<text:line-break/>Resultado esperado:<text:line-break/> <text:s text:c="3"/>• Todas las funcionalidades operan correctamente sin errores.<text:line-break/>Prioridad: Alta<text:line-break/><text:line-break/>Caso de Prueba N° 13<text:line-break/>ID: CP-013<text:line-break/>Título: Inicio de sesión correcto<text:line-break/>Precondiciones:<text:line-break/> <text:s text:c="3"/>• Usuario registrado en el sistema.<text:line-break/> <text:s text:c="3"/>• Credenciales válidas (ej. correo: test@example.com, contraseña: Test1234).<text:line-break/> <text:s text:c="3"/>• Usuario en la página de login (ruta /login).<text:line-break/>Pasos a reproducir:<text:line-break/> <text:s text:c="3"/>1. Ingresar al formulario de inicio de sesión.<text:line-break/> <text:s text:c="3"/>2. Escribir correo electrónico: test@example.com.<text:line-break/> <text:s text:c="3"/>3. Escribir contraseña: Test1234.<text:line-break/> <text:s text:c="3"/>4. Presionar "Iniciar Sesión".<text:line-break/><text:soft-page-break/>Resultado esperado:<text:line-break/> <text:s text:c="3"/>• El usuario accede correctamente a su cuenta.<text:line-break/> <text:s text:c="3"/>• Se redirige a la página principal (ruta /).<text:line-break/>Prioridad: Crítica<text:line-break/><text:line-break/>Caso de Prueba N° 14<text:line-break/>ID: CP-014<text:line-break/>Título: Inicio de sesión con contraseña incorrecta<text:line-break/>Precondiciones:<text:line-break/> <text:s text:c="3"/>• Usuario registrado (ej. correo: test@example.com, contraseña correcta: Test1234).<text:line-break/> <text:s text:c="3"/>• Usuario en la página de login (ruta /login).<text:line-break/>Pasos a reproducir:<text:line-break/> <text:s text:c="3"/>1. Ingresar correo electrónico: test@example.com.<text:line-break/> <text:s text:c="3"/>2. Ingresar contraseña: ContraseñaIncorrecta2024.<text:line-break/> <text:s text:c="3"/>3. Presionar "Iniciar Sesión".<text:line-break/>Resultado esperado:<text:line-break/> <text:s text:c="3"/>• El acceso es rechazado.<text:line-break/> <text:s text:c="3"/>• Se muestra un mensaje indicando credenciales incorrectas.<text:line-break/>Prioridad: Crítica<text:line-break/><text:line-break/>Caso de Prueba N° 15<text:line-break/>ID: CP-015<text:line-break/>Título: Inicio de sesión con correo inexistente<text:line-break/>Precondiciones:<text:line-break/> <text:s text:c="3"/>• El correo ingresado no se encuentra registrado.<text:line-break/> <text:s text:c="3"/>• Usuario en la página de login (ruta /login).<text:line-break/>Pasos a reproducir:<text:line-break/> <text:s text:c="3"/>1. Ingresar correo: inexistente@ejemplo.com.<text:line-break/> <text:s text:c="3"/>2. Ingresar contraseña: cualquier123.<text:line-break/> <text:s text:c="3"/>3. Presionar "Iniciar Sesión".<text:line-break/>Resultado esperado:<text:line-break/> <text:s text:c="3"/>• El sistema no permite el acceso.<text:line-break/> <text:s text:c="3"/>• Se muestra un mensaje de error.<text:line-break/>Prioridad: Alta<text:line-break/><text:line-break/>Caso de Prueba N° 16<text:line-break/>ID: CP-016<text:line-break/>Título: Campos vacíos en inicio de sesión<text:line-break/>Precondiciones:<text:line-break/> <text:s text:c="3"/>• Formulario de login disponible (ruta /login).<text:line-break/>Pasos a reproducir:<text:line-break/> <text:s text:c="3"/>1. Dejar correo vacío.<text:line-break/> <text:s text:c="3"/>2. Dejar contraseña vacía.<text:line-break/> <text:s text:c="3"/>3. Presionar "Iniciar Sesión".<text:line-break/>Resultado esperado:<text:line-break/> <text:s text:c="3"/>• Se muestran mensajes de validación.<text:line-break/><text:soft-page-break/> <text:s text:c="3"/>• No se envía la solicitud al servidor.<text:line-break/>Prioridad: Alta<text:line-break/><text:line-break/>Caso de Prueba N° 17<text:line-break/>ID: CP-017<text:line-break/>Título: Cierre de sesión<text:line-break/>Precondiciones:<text:line-break/> <text:s text:c="3"/>• Usuario autenticado (ej. sesión iniciada con test@example.com / Test1234).<text:line-break/> <text:s text:c="3"/>• Usuario en la página principal (ruta /).<text:line-break/>Pasos a reproducir:<text:line-break/> <text:s text:c="3"/>1. Presionar el botón "Cerrar Sesión".<text:line-break/>Resultado esperado:<text:line-break/> <text:s text:c="3"/>• La sesión finaliza correctamente.<text:line-break/> <text:s text:c="3"/>• El usuario es redirigido a la página de login (ruta /login).<text:line-break/>Prioridad: Alta<text:line-break/><text:line-break/>Caso de Prueba N° 18<text:line-break/>ID: CP-018<text:line-break/>Título: Recuperación de contraseña con correo válido<text:line-break/>Precondiciones:<text:line-break/> <text:s text:c="3"/>• Usuario registrado (ej. correo: test@example.com).<text:line-break/> <text:s text:c="3"/>• Usuario en la página de login (ruta /login).<text:line-break/>Pasos a reproducir:<text:line-break/> <text:s text:c="3"/>1. Presionar "Olvidé mi contraseña".<text:line-break/> <text:s text:c="3"/>2. Ingresar correo: test@example.com.<text:line-break/> <text:s text:c="3"/>3. Solicitar recuperación.<text:line-break/>Resultado esperado:<text:line-break/> <text:s text:c="3"/>• Se envía un correo de recuperación.<text:line-break/> <text:s text:c="3"/>• Se informa al usuario que el correo fue enviado.<text:line-break/>Prioridad: Crítica<text:line-break/><text:line-break/>Caso de Prueba N° 19<text:line-break/>ID: CP-019<text:line-break/>Título: Recuperación de contraseña con correo inexistente<text:line-break/>Precondiciones:<text:line-break/> <text:s text:c="3"/>• Correo no registrado.<text:line-break/> <text:s text:c="3"/>• Usuario en la página de recuperación de contraseña.<text:line-break/>Pasos a reproducir:<text:line-break/> <text:s text:c="3"/>1. Acceder a recuperación de contraseña.<text:line-break/> <text:s text:c="3"/>2. Ingresar correo: correo-inexistente@ejemplo.com.<text:line-break/> <text:s text:c="3"/>3. Solicitar recuperación.<text:line-break/>Resultado esperado:<text:line-break/> <text:s text:c="3"/>• Se muestra mensaje informativo.<text:line-break/> <text:s text:c="3"/>• No se genera recuperación para cuentas inexistentes.<text:line-break/>Prioridad: Alta<text:line-break/><text:line-break/><text:soft-page-break/>Caso de Prueba N° 20<text:line-break/>ID: CP-020<text:line-break/>Título: Cambio de contraseña mediante enlace de recuperación<text:line-break/>Precondiciones:<text:line-break/> <text:s text:c="3"/>• Usuario recibió correo de recuperación (ej. token válido).<text:line-break/> <text:s text:c="3"/>• Usuario accede al enlace de recuperación.<text:line-break/>Pasos a reproducir:<text:line-break/> <text:s text:c="3"/>1. Abrir enlace recibido.<text:line-break/> <text:s text:c="3"/>2. Ingresar nueva contraseña: NuevaPass2024.<text:line-break/> <text:s text:c="3"/>3. Confirmar contraseña: NuevaPass2024.<text:line-break/> <text:s text:c="3"/>4. Guardar cambios.<text:line-break/>Resultado esperado:<text:line-break/> <text:s text:c="3"/>• Contraseña actualizada correctamente.<text:line-break/> <text:s text:c="3"/>• Usuario puede iniciar sesión con la nueva contraseña.<text:line-break/>Prioridad: Crítica<text:line-break/><text:line-break/>Caso de Prueba N° 21<text:line-break/>ID: CP-021<text:line-break/>Título: Enlace de recuperación expirado<text:line-break/>Precondiciones:<text:line-break/> <text:s text:c="3"/>• Token de recuperación vencido.<text:line-break/> <text:s text:c="3"/>• Usuario accede al enlace expirado.<text:line-break/>Pasos a reproducir:<text:line-break/> <text:s text:c="3"/>1. Abrir enlace expirado.<text:line-break/>Resultado esperado:<text:line-break/> <text:s text:c="3"/>• El sistema informa que el enlace ha expirado.<text:line-break/> <text:s text:c="3"/>• Se solicita generar una nueva recuperación.<text:line-break/>Prioridad: Alta<text:line-break/><text:line-break/>Caso de Prueba N° 22<text:line-break/>ID: CP-022<text:line-break/>Título: Registro de usuario nuevo<text:line-break/>Precondiciones:<text:line-break/> <text:s text:c="3"/>• Usuario no registrado.<text:line-break/> <text:s text:c="3"/>• Usuario en la página de registro (ruta /register).<text:line-break/>Pasos a reproducir:<text:line-break/> <text:s text:c="3"/>1. Acceder al formulario de registro.<text:line-break/> <text:s text:c="3"/>2. Completar nombre: "Usuario Test".<text:line-break/> <text:s text:c="3"/>3. Completar correo: nuevousuario@ejemplo.com.<text:line-break/> <text:s text:c="3"/>4. Completar contraseña: PassTest2024.<text:line-break/> <text:s text:c="3"/>5. Confirmar registro.<text:line-break/>Resultado esperado:<text:line-break/> <text:s text:c="3"/>• Cuenta creada exitosamente.<text:line-break/> <text:s text:c="3"/>• Usuario registrado en la base de datos.<text:line-break/>Prioridad: Crítica<text:line-break/><text:line-break/><text:soft-page-break/>Caso de Prueba N° 23<text:line-break/>ID: CP-023<text:line-break/>Título: Registro con correo ya existente<text:line-break/>Precondiciones:<text:line-break/> <text:s text:c="3"/>• Existe una cuenta con ese correo (ej. test@example.com).<text:line-break/> <text:s text:c="3"/>• Usuario en la página de registro (ruta /register).<text:line-break/>Pasos a reproducir:<text:line-break/> <text:s text:c="3"/>1. Completar nombre: "Usuario Test".<text:line-break/> <text:s text:c="3"/>2. Completar correo: test@example.com.<text:line-break/> <text:s text:c="3"/>3. Completar contraseña: PassTest2024.<text:line-break/> <text:s text:c="3"/>4. Confirmar registro.<text:line-break/>Resultado esperado:<text:line-break/> <text:s text:c="3"/>• El sistema rechaza el registro.<text:line-break/> <text:s text:c="3"/>• Se informa que el correo ya está en uso.<text:line-break/>Prioridad: Alta<text:line-break/><text:line-break/>Caso de Prueba N° 24<text:line-break/>ID: CP-024<text:line-break/>Título: Validación de contraseña mínima<text:line-break/>Precondiciones:<text:line-break/> <text:s text:c="3"/>• Formulario de registro disponible (ruta /register).<text:line-break/>Pasos a reproducir:<text:line-break/> <text:s text:c="3"/>1. Ingresar nombre: "Usuario Test".<text:line-break/> <text:s text:c="3"/>2. Ingresar correo: test-minpass@ejemplo.com.<text:line-break/> <text:s text:c="3"/>3. Ingresar contraseña: "12" (menor a la longitud permitida, ej. 8 caracteres).<text:line-break/> <text:s text:c="3"/>4. Intentar registrarse.<text:line-break/>Resultado esperado:<text:line-break/> <text:s text:c="3"/>• El sistema muestra un mensaje de validación.<text:line-break/> <text:s text:c="3"/>• No se crea la cuenta.<text:line-break/>Prioridad: Alta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9T18:54:33.493682078</meta:creation-date>
    <dc:date>2026-06-05T20:49:54.153026900</dc:date>
    <meta:editing-duration>PT11M56S</meta:editing-duration>
    <meta:editing-cycles>3</meta:editing-cycles>
    <meta:generator>LibreOffice/26.2.3.2$Windows_X86_64 LibreOffice_project/70e089b17412e4cb7773e41413306b17a2328c34</meta:generator>
    <meta:print-date>2026-06-05T20:43:54.735874600</meta:print-date>
    <meta:printed-by>Archivos PDF</meta:printed-by>
    <meta:document-statistic meta:table-count="0" meta:image-count="0" meta:object-count="0" meta:page-count="8" meta:paragraph-count="2" meta:word-count="1538" meta:character-count="10920" meta:non-whitespace-character-count="8727"/>
  </office:meta>
</office:document-meta>
</file>