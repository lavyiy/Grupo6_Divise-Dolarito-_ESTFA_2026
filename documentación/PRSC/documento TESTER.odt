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12pt" fo:language="es" fo:country="ES" officeooo:rsid="00178eff" officeooo:paragraph-rsid="001ab871" style:font-size-asian="12pt" style:font-size-complex="12pt"/>
    </style:style>
    <style:style style:name="P2" style:family="paragraph" style:parent-style-name="Heading_20_1">
      <style:text-properties style:font-name="Arial" fo:font-size="12pt" fo:language="es" fo:country="ES" officeooo:rsid="00178eff" style:font-size-asian="12pt" style:font-size-complex="12pt"/>
    </style:style>
    <style:style style:name="P3" style:family="paragraph" style:parent-style-name="Text_20_body">
      <style:text-properties style:font-name="Arial" fo:language="es" fo:country="ES" officeooo:rsid="00178eff" style:font-size-asian="12pt"/>
    </style:style>
    <style:style style:name="P4" style:family="paragraph" style:parent-style-name="Text_20_body" style:list-style-name="L1">
      <style:text-properties style:font-name="Arial" fo:language="es" fo:country="ES" officeooo:rsid="00178eff" style:font-size-asian="12pt"/>
    </style:style>
    <style:style style:name="P5" style:family="paragraph" style:parent-style-name="Text_20_body" style:list-style-name="L2">
      <style:text-properties style:font-name="Arial" fo:language="es" fo:country="ES" officeooo:rsid="00178eff" style:font-size-asian="12pt"/>
    </style:style>
    <style:style style:name="P6" style:family="paragraph" style:parent-style-name="Text_20_body" style:list-style-name="L3">
      <style:text-properties style:font-name="Arial" fo:language="es" fo:country="ES" officeooo:rsid="00178eff" style:font-size-asian="12pt"/>
    </style:style>
    <style:style style:name="P7" style:family="paragraph" style:parent-style-name="Text_20_body" style:list-style-name="L4">
      <style:text-properties style:font-name="Arial" fo:language="es" fo:country="ES" officeooo:rsid="00178eff" style:font-size-asian="12pt"/>
    </style:style>
    <style:style style:name="P8" style:family="paragraph" style:parent-style-name="Text_20_body" style:list-style-name="L5">
      <style:text-properties style:font-name="Arial" fo:language="es" fo:country="ES" officeooo:rsid="00178eff" style:font-size-asian="12pt"/>
    </style:style>
    <style:style style:name="P9" style:family="paragraph" style:parent-style-name="Text_20_body" style:list-style-name="L6">
      <style:text-properties style:font-name="Arial" fo:language="es" fo:country="ES" officeooo:rsid="00178eff" style:font-size-asian="12pt"/>
    </style:style>
    <style:style style:name="P10" style:family="paragraph" style:parent-style-name="Text_20_body" style:list-style-name="L7">
      <style:text-properties style:font-name="Arial" fo:language="es" fo:country="ES" officeooo:rsid="00178eff" style:font-size-asian="12pt"/>
    </style:style>
    <style:style style:name="P11" style:family="paragraph" style:parent-style-name="Text_20_body" style:list-style-name="L8">
      <style:text-properties style:font-name="Arial" fo:language="es" fo:country="ES" officeooo:rsid="00178eff" style:font-size-asian="12pt"/>
    </style:style>
    <style:style style:name="P12" style:family="paragraph" style:parent-style-name="Text_20_body" style:list-style-name="L9">
      <style:text-properties style:font-name="Arial" fo:language="es" fo:country="ES" officeooo:rsid="00178eff" style:font-size-asian="12pt"/>
    </style:style>
    <style:style style:name="P13" style:family="paragraph" style:parent-style-name="Text_20_body" style:list-style-name="L10">
      <style:text-properties style:font-name="Arial" fo:language="es" fo:country="ES" officeooo:rsid="00178eff" style:font-size-asian="12pt"/>
    </style:style>
    <style:style style:name="P14" style:family="paragraph" style:parent-style-name="Text_20_body" style:list-style-name="L11">
      <style:text-properties style:font-name="Arial" fo:language="es" fo:country="ES" officeooo:rsid="00178eff" style:font-size-asian="12pt"/>
    </style:style>
    <style:style style:name="P15" style:family="paragraph" style:parent-style-name="Text_20_body" style:list-style-name="L12">
      <style:text-properties style:font-name="Arial" fo:language="es" fo:country="ES" officeooo:rsid="00178eff" style:font-size-asian="12pt"/>
    </style:style>
    <style:style style:name="P16" style:family="paragraph" style:parent-style-name="Text_20_body" style:list-style-name="L13">
      <style:text-properties style:font-name="Arial" fo:language="es" fo:country="ES" officeooo:rsid="00178eff" style:font-size-asian="12pt"/>
    </style:style>
    <style:style style:name="P17" style:family="paragraph" style:parent-style-name="Text_20_body" style:list-style-name="L14">
      <style:text-properties style:font-name="Arial" fo:language="es" fo:country="ES" officeooo:rsid="00178eff" style:font-size-asian="12pt"/>
    </style:style>
    <style:style style:name="P18" style:family="paragraph" style:parent-style-name="Text_20_body" style:list-style-name="L15">
      <style:text-properties style:font-name="Arial" fo:language="es" fo:country="ES" officeooo:rsid="00178eff" style:font-size-asian="12pt"/>
    </style:style>
    <style:style style:name="P19" style:family="paragraph" style:parent-style-name="Text_20_body" style:list-style-name="L16">
      <style:text-properties style:font-name="Arial" fo:language="es" fo:country="ES" officeooo:rsid="00178eff" style:font-size-asian="12pt"/>
    </style:style>
    <style:style style:name="P20" style:family="paragraph" style:parent-style-name="Text_20_body" style:list-style-name="L17">
      <style:text-properties style:font-name="Arial" fo:language="es" fo:country="ES" officeooo:rsid="00178eff" style:font-size-asian="12pt"/>
    </style:style>
    <style:style style:name="P21" style:family="paragraph" style:parent-style-name="Text_20_body" style:list-style-name="L18">
      <style:text-properties style:font-name="Arial" fo:language="es" fo:country="ES" officeooo:rsid="00178eff" style:font-size-asian="12pt"/>
    </style:style>
    <style:style style:name="P22" style:family="paragraph" style:parent-style-name="Text_20_body" style:list-style-name="L19">
      <style:text-properties style:font-name="Arial" fo:language="es" fo:country="ES" officeooo:rsid="00178eff" style:font-size-asian="12pt"/>
    </style:style>
    <style:style style:name="P23" style:family="paragraph" style:parent-style-name="Text_20_body" style:list-style-name="L20">
      <style:text-properties style:font-name="Arial" fo:language="es" fo:country="ES" officeooo:rsid="00178eff" style:font-size-asian="12pt"/>
    </style:style>
    <style:style style:name="P24" style:family="paragraph" style:parent-style-name="Text_20_body" style:list-style-name="L21">
      <style:text-properties style:font-name="Arial" fo:language="es" fo:country="ES" officeooo:rsid="00178eff" style:font-size-asian="12pt"/>
    </style:style>
    <style:style style:name="P25" style:family="paragraph" style:parent-style-name="Text_20_body" style:list-style-name="L22">
      <style:text-properties style:font-name="Arial" fo:language="es" fo:country="ES" officeooo:rsid="00178eff" style:font-size-asian="12pt"/>
    </style:style>
    <style:style style:name="P26" style:family="paragraph" style:parent-style-name="Text_20_body" style:list-style-name="L23">
      <style:text-properties style:font-name="Arial" fo:language="es" fo:country="ES" officeooo:rsid="00178eff" style:font-size-asian="12pt"/>
    </style:style>
    <style:style style:name="P27" style:family="paragraph" style:parent-style-name="Text_20_body" style:list-style-name="L24">
      <style:text-properties style:font-name="Arial" fo:language="es" fo:country="ES" officeooo:rsid="00178eff" style:font-size-asian="12pt"/>
    </style:style>
    <style:style style:name="P28" style:family="paragraph" style:parent-style-name="Text_20_body" style:list-style-name="L25">
      <style:text-properties style:font-name="Arial" fo:language="es" fo:country="ES" officeooo:rsid="00178eff" style:font-size-asian="12pt"/>
    </style:style>
    <style:style style:name="P29" style:family="paragraph" style:parent-style-name="Text_20_body" style:list-style-name="L26">
      <style:text-properties style:font-name="Arial" fo:language="es" fo:country="ES" officeooo:rsid="00178eff" style:font-size-asian="12pt"/>
    </style:style>
    <style:style style:name="P30" style:family="paragraph" style:parent-style-name="Text_20_body" style:list-style-name="L27">
      <style:text-properties style:font-name="Arial" fo:language="es" fo:country="ES" officeooo:rsid="00178eff" style:font-size-asian="12pt"/>
    </style:style>
    <style:style style:name="P31" style:family="paragraph" style:parent-style-name="Text_20_body" style:list-style-name="L28">
      <style:text-properties style:font-name="Arial" fo:language="es" fo:country="ES" officeooo:rsid="00178eff" style:font-size-asian="12pt"/>
    </style:style>
    <style:style style:name="P32" style:family="paragraph" style:parent-style-name="Text_20_body" style:list-style-name="L29">
      <style:text-properties style:font-name="Arial" fo:language="es" fo:country="ES" officeooo:rsid="00178eff" style:font-size-asian="12pt"/>
    </style:style>
    <style:style style:name="P33" style:family="paragraph" style:parent-style-name="Text_20_body" style:list-style-name="L30">
      <style:text-properties style:font-name="Arial" fo:language="es" fo:country="ES" officeooo:rsid="00178eff" style:font-size-asian="12pt"/>
    </style:style>
    <style:style style:name="P34" style:family="paragraph" style:parent-style-name="Text_20_body" style:list-style-name="L31">
      <style:text-properties style:font-name="Arial" fo:language="es" fo:country="ES" officeooo:rsid="00178eff" style:font-size-asian="12pt"/>
    </style:style>
    <style:style style:name="P35" style:family="paragraph" style:parent-style-name="Text_20_body" style:list-style-name="L32">
      <style:text-properties style:font-name="Arial" fo:language="es" fo:country="ES" officeooo:rsid="00178eff" style:font-size-asian="12pt"/>
    </style:style>
    <style:style style:name="P36" style:family="paragraph" style:parent-style-name="Text_20_body" style:list-style-name="L33">
      <style:text-properties style:font-name="Arial" fo:language="es" fo:country="ES" officeooo:rsid="00178eff" style:font-size-asian="12pt"/>
    </style:style>
    <style:style style:name="P37" style:family="paragraph" style:parent-style-name="Text_20_body" style:list-style-name="L34">
      <style:text-properties style:font-name="Arial" fo:language="es" fo:country="ES" officeooo:rsid="00178eff" style:font-size-asian="12pt"/>
    </style:style>
    <style:style style:name="P38" style:family="paragraph" style:parent-style-name="Text_20_body" style:list-style-name="L35">
      <style:text-properties style:font-name="Arial" fo:language="es" fo:country="ES" officeooo:rsid="00178eff" style:font-size-asian="12pt"/>
    </style:style>
    <style:style style:name="P39" style:family="paragraph" style:parent-style-name="Text_20_body" style:list-style-name="L36">
      <style:text-properties style:font-name="Arial" fo:language="es" fo:country="ES" officeooo:rsid="00178eff" style:font-size-asian="12pt"/>
    </style:style>
    <style:style style:name="P40" style:family="paragraph" style:parent-style-name="Text_20_body" style:list-style-name="L37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41" style:family="paragraph" style:parent-style-name="Text_20_body" style:list-style-name="L37">
      <style:text-properties style:font-name="Arial" fo:language="es" fo:country="ES" officeooo:rsid="00178eff" style:font-size-asian="12pt"/>
    </style:style>
    <style:style style:name="P42" style:family="paragraph" style:parent-style-name="Text_20_body" style:list-style-name="L38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43" style:family="paragraph" style:parent-style-name="Text_20_body" style:list-style-name="L38">
      <style:text-properties style:font-name="Arial" fo:language="es" fo:country="ES" officeooo:rsid="00178eff" style:font-size-asian="12pt"/>
    </style:style>
    <style:style style:name="P44" style:family="paragraph" style:parent-style-name="Text_20_body" style:list-style-name="L39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45" style:family="paragraph" style:parent-style-name="Text_20_body" style:list-style-name="L39">
      <style:text-properties style:font-name="Arial" fo:language="es" fo:country="ES" officeooo:rsid="00178eff" style:font-size-asian="12pt"/>
    </style:style>
    <style:style style:name="P46" style:family="paragraph" style:parent-style-name="Heading_20_1">
      <style:paragraph-properties fo:margin-top="0cm" fo:margin-bottom="0.247cm" style:contextual-spacing="false" fo:line-height="115%"/>
      <style:text-properties style:font-name="Arial" fo:font-size="12pt" fo:language="es" fo:country="ES" officeooo:rsid="00178eff" style:font-size-asian="12pt" style:font-size-complex="12pt"/>
    </style:style>
    <style:style style:name="P47" style:family="paragraph" style:parent-style-name="Text_20_body" style:list-style-name="L40">
      <style:text-properties style:font-name="Arial" fo:language="es" fo:country="ES" officeooo:rsid="00178eff" style:font-size-asian="12pt"/>
    </style:style>
    <style:style style:name="P48" style:family="paragraph" style:parent-style-name="Text_20_body" style:list-style-name="L41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49" style:family="paragraph" style:parent-style-name="Text_20_body" style:list-style-name="L41">
      <style:text-properties style:font-name="Arial" fo:language="es" fo:country="ES" officeooo:rsid="00178eff" style:font-size-asian="12pt"/>
    </style:style>
    <style:style style:name="P50" style:family="paragraph" style:parent-style-name="Text_20_body" style:list-style-name="L42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51" style:family="paragraph" style:parent-style-name="Text_20_body" style:list-style-name="L42">
      <style:text-properties style:font-name="Arial" fo:language="es" fo:country="ES" officeooo:rsid="00178eff" style:font-size-asian="12pt"/>
    </style:style>
    <style:style style:name="P52" style:family="paragraph" style:parent-style-name="Text_20_body" style:list-style-name="L43">
      <style:text-properties style:font-name="Arial" fo:language="es" fo:country="ES" officeooo:rsid="00178eff" style:font-size-asian="12pt"/>
    </style:style>
    <style:style style:name="P53" style:family="paragraph" style:parent-style-name="Text_20_body" style:list-style-name="L44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54" style:family="paragraph" style:parent-style-name="Text_20_body" style:list-style-name="L44">
      <style:text-properties style:font-name="Arial" fo:language="es" fo:country="ES" officeooo:rsid="00178eff" style:font-size-asian="12pt"/>
    </style:style>
    <style:style style:name="P55" style:family="paragraph" style:parent-style-name="Text_20_body" style:list-style-name="L45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56" style:family="paragraph" style:parent-style-name="Text_20_body" style:list-style-name="L45">
      <style:text-properties style:font-name="Arial" fo:language="es" fo:country="ES" officeooo:rsid="00178eff" style:font-size-asian="12pt"/>
    </style:style>
    <style:style style:name="P57" style:family="paragraph" style:parent-style-name="Text_20_body" style:list-style-name="L46">
      <style:text-properties style:font-name="Arial" fo:language="es" fo:country="ES" officeooo:rsid="00178eff" style:font-size-asian="12pt"/>
    </style:style>
    <style:style style:name="P58" style:family="paragraph" style:parent-style-name="Text_20_body" style:list-style-name="L47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59" style:family="paragraph" style:parent-style-name="Text_20_body" style:list-style-name="L47">
      <style:text-properties style:font-name="Arial" fo:language="es" fo:country="ES" officeooo:rsid="00178eff" style:font-size-asian="12pt"/>
    </style:style>
    <style:style style:name="P60" style:family="paragraph" style:parent-style-name="Text_20_body" style:list-style-name="L48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61" style:family="paragraph" style:parent-style-name="Text_20_body" style:list-style-name="L48">
      <style:text-properties style:font-name="Arial" fo:language="es" fo:country="ES" officeooo:rsid="00178eff" style:font-size-asian="12pt"/>
    </style:style>
    <style:style style:name="P62" style:family="paragraph" style:parent-style-name="Text_20_body" style:list-style-name="L49">
      <style:text-properties style:font-name="Arial" fo:language="es" fo:country="ES" officeooo:rsid="00178eff" style:font-size-asian="12pt"/>
    </style:style>
    <style:style style:name="P63" style:family="paragraph" style:parent-style-name="Text_20_body" style:list-style-name="L50">
      <style:text-properties style:font-name="Arial" fo:language="es" fo:country="ES" officeooo:rsid="00178eff" style:font-size-asian="12pt"/>
    </style:style>
    <style:style style:name="P64" style:family="paragraph" style:parent-style-name="Text_20_body" style:list-style-name="L51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65" style:family="paragraph" style:parent-style-name="Text_20_body" style:list-style-name="L51">
      <style:text-properties style:font-name="Arial" fo:language="es" fo:country="ES" officeooo:rsid="00178eff" style:font-size-asian="12pt"/>
    </style:style>
    <style:style style:name="P66" style:family="paragraph" style:parent-style-name="Text_20_body" style:list-style-name="L52">
      <style:text-properties style:font-name="Arial" fo:language="es" fo:country="ES" officeooo:rsid="00178eff" style:font-size-asian="12pt"/>
    </style:style>
    <style:style style:name="P67" style:family="paragraph" style:parent-style-name="Text_20_body" style:list-style-name="L53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68" style:family="paragraph" style:parent-style-name="Text_20_body" style:list-style-name="L53">
      <style:text-properties style:font-name="Arial" fo:language="es" fo:country="ES" officeooo:rsid="00178eff" style:font-size-asian="12pt"/>
    </style:style>
    <style:style style:name="P69" style:family="paragraph" style:parent-style-name="Text_20_body" style:list-style-name="L54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70" style:family="paragraph" style:parent-style-name="Text_20_body" style:list-style-name="L54">
      <style:text-properties style:font-name="Arial" fo:language="es" fo:country="ES" officeooo:rsid="00178eff" style:font-size-asian="12pt"/>
    </style:style>
    <style:style style:name="P71" style:family="paragraph" style:parent-style-name="Text_20_body" style:list-style-name="L55">
      <style:text-properties style:font-name="Arial" fo:language="es" fo:country="ES" officeooo:rsid="00178eff" style:font-size-asian="12pt"/>
    </style:style>
    <style:style style:name="P72" style:family="paragraph" style:parent-style-name="Text_20_body" style:list-style-name="L56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73" style:family="paragraph" style:parent-style-name="Text_20_body" style:list-style-name="L56">
      <style:text-properties style:font-name="Arial" fo:language="es" fo:country="ES" officeooo:rsid="00178eff" style:font-size-asian="12pt"/>
    </style:style>
    <style:style style:name="P74" style:family="paragraph" style:parent-style-name="Text_20_body" style:list-style-name="L57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75" style:family="paragraph" style:parent-style-name="Text_20_body" style:list-style-name="L57">
      <style:text-properties style:font-name="Arial" fo:language="es" fo:country="ES" officeooo:rsid="00178eff" style:font-size-asian="12pt"/>
    </style:style>
    <style:style style:name="P76" style:family="paragraph" style:parent-style-name="Heading_20_1">
      <style:paragraph-properties fo:margin-top="0cm" fo:margin-bottom="0.247cm" style:contextual-spacing="false" fo:line-height="115%">
        <style:tab-stops>
          <style:tab-stop style:position="2.355cm"/>
        </style:tab-stops>
      </style:paragraph-properties>
      <style:text-properties style:font-name="Arial" fo:font-size="12pt" fo:language="es" fo:country="ES" officeooo:rsid="00178eff" style:font-size-asian="12pt" style:font-size-complex="12pt"/>
    </style:style>
    <style:style style:name="P77" style:family="paragraph" style:parent-style-name="Text_20_body" style:list-style-name="L58">
      <style:text-properties style:font-name="Arial" fo:language="es" fo:country="ES" officeooo:rsid="00178eff" style:font-size-asian="12pt"/>
    </style:style>
    <style:style style:name="P78" style:family="paragraph" style:parent-style-name="Text_20_body" style:list-style-name="L59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79" style:family="paragraph" style:parent-style-name="Text_20_body" style:list-style-name="L59">
      <style:text-properties style:font-name="Arial" fo:language="es" fo:country="ES" officeooo:rsid="00178eff" style:font-size-asian="12pt"/>
    </style:style>
    <style:style style:name="P80" style:family="paragraph" style:parent-style-name="Text_20_body" style:list-style-name="L60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81" style:family="paragraph" style:parent-style-name="Text_20_body" style:list-style-name="L60">
      <style:text-properties style:font-name="Arial" fo:language="es" fo:country="ES" officeooo:rsid="00178eff" style:font-size-asian="12pt"/>
    </style:style>
    <style:style style:name="P82" style:family="paragraph" style:parent-style-name="Text_20_body" style:list-style-name="L61">
      <style:text-properties style:font-name="Arial" fo:language="es" fo:country="ES" officeooo:rsid="00178eff" style:font-size-asian="12pt"/>
    </style:style>
    <style:style style:name="P83" style:family="paragraph" style:parent-style-name="Text_20_body" style:list-style-name="L62">
      <style:text-properties style:font-name="Arial" fo:language="es" fo:country="ES" officeooo:rsid="00178eff" style:font-size-asian="12pt"/>
    </style:style>
    <style:style style:name="P84" style:family="paragraph" style:parent-style-name="Text_20_body" style:list-style-name="L63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85" style:family="paragraph" style:parent-style-name="Text_20_body" style:list-style-name="L63">
      <style:text-properties style:font-name="Arial" fo:language="es" fo:country="ES" officeooo:rsid="00178eff" style:font-size-asian="12pt"/>
    </style:style>
    <style:style style:name="P86" style:family="paragraph" style:parent-style-name="Text_20_body" style:list-style-name="L64">
      <style:text-properties style:font-name="Arial" fo:language="es" fo:country="ES" officeooo:rsid="00178eff" style:font-size-asian="12pt"/>
    </style:style>
    <style:style style:name="P87" style:family="paragraph" style:parent-style-name="Text_20_body" style:list-style-name="L65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88" style:family="paragraph" style:parent-style-name="Text_20_body" style:list-style-name="L65">
      <style:text-properties style:font-name="Arial" fo:language="es" fo:country="ES" officeooo:rsid="00178eff" style:font-size-asian="12pt"/>
    </style:style>
    <style:style style:name="P89" style:family="paragraph" style:parent-style-name="Text_20_body" style:list-style-name="L66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90" style:family="paragraph" style:parent-style-name="Text_20_body" style:list-style-name="L66">
      <style:text-properties style:font-name="Arial" fo:language="es" fo:country="ES" officeooo:rsid="00178eff" style:font-size-asian="12pt"/>
    </style:style>
    <style:style style:name="P91" style:family="paragraph" style:parent-style-name="Text_20_body" style:list-style-name="L67">
      <style:text-properties style:font-name="Arial" fo:language="es" fo:country="ES" officeooo:rsid="00178eff" style:font-size-asian="12pt"/>
    </style:style>
    <style:style style:name="P92" style:family="paragraph" style:parent-style-name="Text_20_body" style:list-style-name="L68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93" style:family="paragraph" style:parent-style-name="Text_20_body" style:list-style-name="L68">
      <style:text-properties style:font-name="Arial" fo:language="es" fo:country="ES" officeooo:rsid="00178eff" style:font-size-asian="12pt"/>
    </style:style>
    <style:style style:name="P94" style:family="paragraph" style:parent-style-name="Text_20_body" style:list-style-name="L69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95" style:family="paragraph" style:parent-style-name="Text_20_body" style:list-style-name="L69">
      <style:text-properties style:font-name="Arial" fo:language="es" fo:country="ES" officeooo:rsid="00178eff" style:font-size-asian="12pt"/>
    </style:style>
    <style:style style:name="P96" style:family="paragraph" style:parent-style-name="Text_20_body" style:list-style-name="L70">
      <style:text-properties style:font-name="Arial" fo:language="es" fo:country="ES" officeooo:rsid="00178eff" style:font-size-asian="12pt"/>
    </style:style>
    <style:style style:name="P97" style:family="paragraph" style:parent-style-name="Text_20_body" style:list-style-name="L71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98" style:family="paragraph" style:parent-style-name="Text_20_body" style:list-style-name="L71">
      <style:text-properties style:font-name="Arial" fo:language="es" fo:country="ES" officeooo:rsid="00178eff" style:font-size-asian="12pt"/>
    </style:style>
    <style:style style:name="P99" style:family="paragraph" style:parent-style-name="Text_20_body" style:list-style-name="L72">
      <style:paragraph-properties fo:margin-top="0cm" fo:margin-bottom="0cm" style:contextual-spacing="false"/>
      <style:text-properties style:font-name="Arial" fo:language="es" fo:country="ES" officeooo:rsid="00178eff" style:font-size-asian="12pt"/>
    </style:style>
    <style:style style:name="P100" style:family="paragraph" style:parent-style-name="Text_20_body" style:list-style-name="L72">
      <style:text-properties style:font-name="Arial" fo:language="es" fo:country="ES" officeooo:rsid="00178eff" style:font-size-asian="12pt"/>
    </style:style>
    <style:style style:name="T1" style:family="text">
      <style:text-properties officeooo:rsid="001ab87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ESTING</text:span></text:span></text:p>
      <text:h text:style-name="P2" text:outline-level="1">Caso de Prueba N° 1</text:h>
      <text:p text:style-name="P3"><text:span text:style-name="Strong_20_Emphasis">ID:</text:span> CP-001</text:p>
      <text:p text:style-name="P3"><text:span text:style-name="Strong_20_Emphasis">Título:</text:span> Visualización de cotizaciones en la página principal</text:p>
      <text:p text:style-name="P3"><text:span text:style-name="Strong_20_Emphasis">Precondiciones:</text:span></text:p>
      <text:list text:style-name="L1">
        <text:list-item>
          <text:p text:style-name="P4">El servidor se encuentra operativo.</text:p>
        </text:list-item>
        <text:list-item>
          <text:p text:style-name="P4">Existe conexión a Internet.</text:p>
        </text:list-item>
      </text:list>
      <text:p text:style-name="P3"><text:span text:style-name="Strong_20_Emphasis">Pasos a reproducir:</text:span></text:p>
      <text:list text:style-name="L2">
        <text:list-item>
          <text:p text:style-name="P5">Ingresar a la página principal de Dolarito.</text:p>
        </text:list-item>
        <text:list-item>
          <text:p text:style-name="P5">Esperar la carga completa del sitio.</text:p>
        </text:list-item>
      </text:list>
      <text:p text:style-name="P3"><text:span text:style-name="Strong_20_Emphasis">Resultado esperado:</text:span></text:p>
      <text:list text:style-name="L3">
        <text:list-item>
          <text:p text:style-name="P6">Se muestran las cotizaciones disponibles.</text:p>
        </text:list-item>
        <text:list-item>
          <text:p text:style-name="P6">Los valores son visibles y legibles.</text:p>
        </text:list-item>
      </text:list>
      <text:p text:style-name="P3"><text:span text:style-name="Strong_20_Emphasis">Prioridad:</text:span> Alta</text:p>
      <text:h text:style-name="P2" text:outline-level="1">Caso de Prueba N° 2</text:h>
      <text:p text:style-name="P3"><text:span text:style-name="Strong_20_Emphasis">ID:</text:span> CP-002</text:p>
      <text:p text:style-name="P3"><text:span text:style-name="Strong_20_Emphasis">Título:</text:span> Actualización automática de cotizaciones</text:p>
      <text:p text:style-name="P3"><text:span text:style-name="Strong_20_Emphasis">Precondiciones:</text:span></text:p>
      <text:list text:style-name="L4">
        <text:list-item>
          <text:p text:style-name="P7">Cotizaciones cargadas correctamente.</text:p>
        </text:list-item>
      </text:list>
      <text:p text:style-name="P3"><text:span text:style-name="Strong_20_Emphasis">Pasos a reproducir:</text:span></text:p>
      <text:list text:style-name="L5">
        <text:list-item>
          <text:p text:style-name="P8">Registrar el valor actual de una cotización.</text:p>
        </text:list-item>
        <text:list-item>
          <text:p text:style-name="P8">Esperar 60 segundos.</text:p>
        </text:list-item>
        <text:list-item>
          <text:p text:style-name="P8">Verificar nuevamente el valor.</text:p>
        </text:list-item>
      </text:list>
      <text:p text:style-name="P3"><text:span text:style-name="Strong_20_Emphasis">Resultado esperado:</text:span></text:p>
      <text:list text:style-name="L6">
        <text:list-item>
          <text:p text:style-name="P9">La información se actualiza automáticamente sin recargar la página.</text:p>
        </text:list-item>
      </text:list>
      <text:p text:style-name="P3"><text:span text:style-name="Strong_20_Emphasis">Prioridad:</text:span> Alta</text:p>
      <text:h text:style-name="P2" text:outline-level="1">Caso de Prueba N° 3</text:h>
      <text:p text:style-name="P3"><text:span text:style-name="Strong_20_Emphasis">ID:</text:span> CP-003</text:p>
      <text:p text:style-name="P3"><text:span text:style-name="Strong_20_Emphasis">Título:</text:span> Funcionamiento de calculadora de conversión</text:p>
      <text:p text:style-name="P3"><text:span text:style-name="Strong_20_Emphasis">Precondiciones:</text:span></text:p>
      <text:list text:style-name="L7">
        <text:list-item>
          <text:p text:style-name="P10">Cotizaciones cargadas.</text:p>
        </text:list-item>
      </text:list>
      <text:p text:style-name="P3"><text:soft-page-break/><text:span text:style-name="Strong_20_Emphasis">Pasos a reproducir:</text:span></text:p>
      <text:list text:style-name="L8">
        <text:list-item>
          <text:p text:style-name="P11">Ingresar $100.000 ARS.</text:p>
        </text:list-item>
        <text:list-item>
          <text:p text:style-name="P11">Seleccionar conversión a USD Blue.</text:p>
        </text:list-item>
        <text:list-item>
          <text:p text:style-name="P11">Ejecutar cálculo.</text:p>
        </text:list-item>
      </text:list>
      <text:p text:style-name="P3"><text:span text:style-name="Strong_20_Emphasis">Resultado esperado:</text:span></text:p>
      <text:list text:style-name="L9">
        <text:list-item>
          <text:p text:style-name="P12">El resultado coincide con la cotización mostrada.</text:p>
        </text:list-item>
        <text:list-item>
          <text:p text:style-name="P12">Se respetan los decimales correspondientes.</text:p>
        </text:list-item>
      </text:list>
      <text:p text:style-name="P3"><text:span text:style-name="Strong_20_Emphasis">Prioridad:</text:span> Alta</text:p>
      <text:h text:style-name="P2" text:outline-level="1">Caso de Prueba N° 4</text:h>
      <text:p text:style-name="P3"><text:span text:style-name="Strong_20_Emphasis">ID:</text:span> CP-004</text:p>
      <text:p text:style-name="P3"><text:span text:style-name="Strong_20_Emphasis">Título:</text:span> Validación de ingreso de letras en la calculadora</text:p>
      <text:p text:style-name="P3"><text:span text:style-name="Strong_20_Emphasis">Precondiciones:</text:span></text:p>
      <text:list text:style-name="L10">
        <text:list-item>
          <text:p text:style-name="P13">Calculadora disponible.</text:p>
        </text:list-item>
      </text:list>
      <text:p text:style-name="P3"><text:span text:style-name="Strong_20_Emphasis">Pasos a reproducir:</text:span></text:p>
      <text:list text:style-name="L11">
        <text:list-item>
          <text:p text:style-name="P14">Ingresar "abc" en el campo de monto.</text:p>
        </text:list-item>
        <text:list-item>
          <text:p text:style-name="P14">Presionar calcular.</text:p>
        </text:list-item>
      </text:list>
      <text:p text:style-name="P3"><text:span text:style-name="Strong_20_Emphasis">Resultado esperado:</text:span></text:p>
      <text:list text:style-name="L12">
        <text:list-item>
          <text:p text:style-name="P15">El sistema rechaza el valor ingresado.</text:p>
        </text:list-item>
        <text:list-item>
          <text:p text:style-name="P15">Se muestra un mensaje de error.</text:p>
        </text:list-item>
      </text:list>
      <text:p text:style-name="P3"><text:span text:style-name="Strong_20_Emphasis">Prioridad:</text:span> Media</text:p>
      <text:h text:style-name="P2" text:outline-level="1">Caso de Prueba N° 5</text:h>
      <text:p text:style-name="P3"><text:span text:style-name="Strong_20_Emphasis">ID:</text:span> CP-005</text:p>
      <text:p text:style-name="P3"><text:span text:style-name="Strong_20_Emphasis">Título:</text:span> Conversión con valor cero</text:p>
      <text:p text:style-name="P3"><text:span text:style-name="Strong_20_Emphasis">Precondiciones:</text:span></text:p>
      <text:list text:style-name="L13">
        <text:list-item>
          <text:p text:style-name="P16">Calculadora disponible.</text:p>
        </text:list-item>
      </text:list>
      <text:p text:style-name="P3"><text:span text:style-name="Strong_20_Emphasis">Pasos a reproducir:</text:span></text:p>
      <text:list text:style-name="L14">
        <text:list-item>
          <text:p text:style-name="P17">Ingresar 0 en el campo de monto.</text:p>
        </text:list-item>
        <text:list-item>
          <text:p text:style-name="P17">Realizar la conversión.</text:p>
        </text:list-item>
      </text:list>
      <text:p text:style-name="P3"><text:span text:style-name="Strong_20_Emphasis">Resultado esperado:</text:span></text:p>
      <text:list text:style-name="L15">
        <text:list-item>
          <text:p text:style-name="P18">El resultado obtenido es 0.</text:p>
        </text:list-item>
      </text:list>
      <text:p text:style-name="P3"><text:span text:style-name="Strong_20_Emphasis">Prioridad:</text:span> Baja</text:p>
      <text:h text:style-name="P2" text:outline-level="1"><text:soft-page-break/>Caso de Prueba N° 6</text:h>
      <text:p text:style-name="P3"><text:span text:style-name="Strong_20_Emphasis">ID:</text:span> CP-006</text:p>
      <text:p text:style-name="P3"><text:span text:style-name="Strong_20_Emphasis">Título:</text:span> Persistencia del modo oscuro</text:p>
      <text:p text:style-name="P3"><text:span text:style-name="Strong_20_Emphasis">Precondiciones:</text:span></text:p>
      <text:list text:style-name="L16">
        <text:list-item>
          <text:p text:style-name="P19">Usuario ubicado en la página principal.</text:p>
        </text:list-item>
      </text:list>
      <text:p text:style-name="P3"><text:span text:style-name="Strong_20_Emphasis">Pasos a reproducir:</text:span></text:p>
      <text:list text:style-name="L17">
        <text:list-item>
          <text:p text:style-name="P20">Activar el modo oscuro.</text:p>
        </text:list-item>
        <text:list-item>
          <text:p text:style-name="P20">Actualizar la página mediante F5.</text:p>
        </text:list-item>
      </text:list>
      <text:p text:style-name="P3"><text:span text:style-name="Strong_20_Emphasis">Resultado esperado:</text:span></text:p>
      <text:list text:style-name="L18">
        <text:list-item>
          <text:p text:style-name="P21">El modo oscuro permanece activo luego de la actualización.</text:p>
        </text:list-item>
      </text:list>
      <text:p text:style-name="P3"><text:span text:style-name="Strong_20_Emphasis">Prioridad:</text:span> Media</text:p>
      <text:h text:style-name="P2" text:outline-level="1">Caso de Prueba N° 7</text:h>
      <text:p text:style-name="P3"><text:span text:style-name="Strong_20_Emphasis">ID:</text:span> CP-007</text:p>
      <text:p text:style-name="P3"><text:span text:style-name="Strong_20_Emphasis">Título:</text:span> Visualización correcta en dispositivos móviles</text:p>
      <text:p text:style-name="P3"><text:span text:style-name="Strong_20_Emphasis">Precondiciones:</text:span></text:p>
      <text:list text:style-name="L19">
        <text:list-item>
          <text:p text:style-name="P22">Acceso desde un teléfono móvil.</text:p>
        </text:list-item>
      </text:list>
      <text:p text:style-name="P3"><text:span text:style-name="Strong_20_Emphasis">Pasos a reproducir:</text:span></text:p>
      <text:list text:style-name="L20">
        <text:list-item>
          <text:p text:style-name="P23">Abrir Dolarito desde un celular.</text:p>
        </text:list-item>
        <text:list-item>
          <text:p text:style-name="P23">Navegar por las distintas secciones.</text:p>
        </text:list-item>
      </text:list>
      <text:p text:style-name="P3"><text:span text:style-name="Strong_20_Emphasis">Resultado esperado:</text:span></text:p>
      <text:list text:style-name="L21">
        <text:list-item>
          <text:p text:style-name="P24">No existe desplazamiento horizontal.</text:p>
        </text:list-item>
        <text:list-item>
          <text:p text:style-name="P24">Todos los elementos son visibles correctamente.</text:p>
        </text:list-item>
      </text:list>
      <text:p text:style-name="P3"><text:span text:style-name="Strong_20_Emphasis">Prioridad:</text:span> Alta</text:p>
      <text:h text:style-name="P2" text:outline-level="1">Caso de Prueba N° 8</text:h>
      <text:p text:style-name="P3"><text:span text:style-name="Strong_20_Emphasis">ID:</text:span> CP-008</text:p>
      <text:p text:style-name="P3"><text:span text:style-name="Strong_20_Emphasis">Título:</text:span> Comportamiento ante caída de una API externa</text:p>
      <text:p text:style-name="P3"><text:span text:style-name="Strong_20_Emphasis">Precondiciones:</text:span></text:p>
      <text:list text:style-name="L22">
        <text:list-item>
          <text:p text:style-name="P25">Simulación de indisponibilidad de la API de cotizaciones.</text:p>
        </text:list-item>
      </text:list>
      <text:p text:style-name="P3"><text:span text:style-name="Strong_20_Emphasis">Pasos a reproducir:</text:span></text:p>
      <text:list text:style-name="L23">
        <text:list-item>
          <text:p text:style-name="P26">Interrumpir la respuesta de la API.</text:p>
        </text:list-item>
        <text:list-item>
          <text:p text:style-name="P26">Solicitar la carga de cotizaciones.</text:p>
        </text:list-item>
      </text:list>
      <text:p text:style-name="P3"><text:soft-page-break/><text:span text:style-name="Strong_20_Emphasis">Resultado esperado:</text:span></text:p>
      <text:list text:style-name="L24">
        <text:list-item>
          <text:p text:style-name="P27">El sistema muestra los últimos datos almacenados.</text:p>
        </text:list-item>
        <text:list-item>
          <text:p text:style-name="P27">No se produce una caída de la aplicación.</text:p>
        </text:list-item>
      </text:list>
      <text:p text:style-name="P3"><text:span text:style-name="Strong_20_Emphasis">Prioridad:</text:span> Crítica</text:p>
      <text:h text:style-name="P2" text:outline-level="1">Caso de Prueba N° 9</text:h>
      <text:p text:style-name="P3"><text:span text:style-name="Strong_20_Emphasis">ID:</text:span> CP-009</text:p>
      <text:p text:style-name="P3"><text:span text:style-name="Strong_20_Emphasis">Título:</text:span> Carga inicial bajo conexión lenta</text:p>
      <text:p text:style-name="P3"><text:span text:style-name="Strong_20_Emphasis">Precondiciones:</text:span></text:p>
      <text:list text:style-name="L25">
        <text:list-item>
          <text:p text:style-name="P28">Emulación de red 3G lenta.</text:p>
        </text:list-item>
      </text:list>
      <text:p text:style-name="P3"><text:span text:style-name="Strong_20_Emphasis">Pasos a reproducir:</text:span></text:p>
      <text:list text:style-name="L26">
        <text:list-item>
          <text:p text:style-name="P29">Abrir la página principal.</text:p>
        </text:list-item>
        <text:list-item>
          <text:p text:style-name="P29">Observar el proceso de carga.</text:p>
        </text:list-item>
      </text:list>
      <text:p text:style-name="P3"><text:span text:style-name="Strong_20_Emphasis">Resultado esperado:</text:span></text:p>
      <text:list text:style-name="L27">
        <text:list-item>
          <text:p text:style-name="P30">Se muestran skeletons o indicadores de carga.</text:p>
        </text:list-item>
        <text:list-item>
          <text:p text:style-name="P30">La interfaz no aparece vacía.</text:p>
        </text:list-item>
      </text:list>
      <text:p text:style-name="P3"><text:span text:style-name="Strong_20_Emphasis">Prioridad:</text:span> Media</text:p>
      <text:h text:style-name="P2" text:outline-level="1">Caso de Prueba N° 10</text:h>
      <text:p text:style-name="P3"><text:span text:style-name="Strong_20_Emphasis">ID:</text:span> CP-010</text:p>
      <text:p text:style-name="P3"><text:span text:style-name="Strong_20_Emphasis">Título:</text:span> Protección contra SQL Injection</text:p>
      <text:p text:style-name="P3"><text:span text:style-name="Strong_20_Emphasis">Precondiciones:</text:span></text:p>
      <text:list text:style-name="L28">
        <text:list-item>
          <text:p text:style-name="P31">Campo de entrada disponible.</text:p>
        </text:list-item>
      </text:list>
      <text:p text:style-name="P3"><text:span text:style-name="Strong_20_Emphasis">Pasos a reproducir:</text:span></text:p>
      <text:list text:style-name="L29">
        <text:list-item>
          <text:p text:style-name="P32">Ingresar <text:span text:style-name="Source_20_Text">' OR 1=1 --</text:span> en un campo de entrada.</text:p>
        </text:list-item>
        <text:list-item>
          <text:p text:style-name="P32">Ejecutar la acción correspondiente.</text:p>
        </text:list-item>
      </text:list>
      <text:p text:style-name="P3"><text:span text:style-name="Strong_20_Emphasis">Resultado esperado:</text:span></text:p>
      <text:list text:style-name="L30">
        <text:list-item>
          <text:p text:style-name="P33">La entrada es rechazada.</text:p>
        </text:list-item>
        <text:list-item>
          <text:p text:style-name="P33">No se altera la base de datos.</text:p>
        </text:list-item>
      </text:list>
      <text:p text:style-name="P3"><text:span text:style-name="Strong_20_Emphasis">Prioridad:</text:span> Crítica</text:p>
      <text:h text:style-name="P2" text:outline-level="1">Caso de Prueba N° 11</text:h>
      <text:p text:style-name="P3"><text:span text:style-name="Strong_20_Emphasis">ID:</text:span> CP-011</text:p>
      <text:p text:style-name="P3"><text:span text:style-name="Strong_20_Emphasis">Título:</text:span> Verificación de tiempo de respuesta de la API</text:p>
      <text:p text:style-name="P3"><text:soft-page-break/><text:span text:style-name="Strong_20_Emphasis">Precondiciones:</text:span></text:p>
      <text:list text:style-name="L31">
        <text:list-item>
          <text:p text:style-name="P34">Backend operativo.</text:p>
        </text:list-item>
      </text:list>
      <text:p text:style-name="P3"><text:span text:style-name="Strong_20_Emphasis">Pasos a reproducir:</text:span></text:p>
      <text:list text:style-name="L32">
        <text:list-item>
          <text:p text:style-name="P35">Realizar una solicitud al endpoint de cotizaciones.</text:p>
        </text:list-item>
        <text:list-item>
          <text:p text:style-name="P35">Medir el tiempo de respuesta.</text:p>
        </text:list-item>
      </text:list>
      <text:p text:style-name="P3"><text:span text:style-name="Strong_20_Emphasis">Resultado esperado:</text:span></text:p>
      <text:list text:style-name="L33">
        <text:list-item>
          <text:p text:style-name="P36">La respuesta se obtiene en menos de 500 ms.</text:p>
        </text:list-item>
      </text:list>
      <text:p text:style-name="P3"><text:span text:style-name="Strong_20_Emphasis">Prioridad:</text:span> Alta</text:p>
      <text:h text:style-name="P2" text:outline-level="1">Caso de Prueba N° 12</text:h>
      <text:p text:style-name="P3"><text:span text:style-name="Strong_20_Emphasis">ID:</text:span> CP-012</text:p>
      <text:p text:style-name="P3"><text:span text:style-name="Strong_20_Emphasis">Título:</text:span> Navegación completa del usuario</text:p>
      <text:p text:style-name="P3"><text:span text:style-name="Strong_20_Emphasis">Precondiciones:</text:span></text:p>
      <text:list text:style-name="L34">
        <text:list-item>
          <text:p text:style-name="P37">Sistema funcionando correctamente.</text:p>
        </text:list-item>
      </text:list>
      <text:p text:style-name="P3"><text:span text:style-name="Strong_20_Emphasis">Pasos a reproducir:</text:span></text:p>
      <text:list text:style-name="L35">
        <text:list-item>
          <text:p text:style-name="P38">Ingresar al sitio.</text:p>
        </text:list-item>
        <text:list-item>
          <text:p text:style-name="P38">Consultar cotizaciones.</text:p>
        </text:list-item>
        <text:list-item>
          <text:p text:style-name="P38">Utilizar la calculadora.</text:p>
        </text:list-item>
        <text:list-item>
          <text:p text:style-name="P38">Activar modo oscuro.</text:p>
        </text:list-item>
        <text:list-item>
          <text:p text:style-name="P38">Actualizar la página.</text:p>
        </text:list-item>
      </text:list>
      <text:p text:style-name="P3"><text:span text:style-name="Strong_20_Emphasis">Resultado esperado:</text:span></text:p>
      <text:list text:style-name="L36">
        <text:list-item>
          <text:p text:style-name="P39">Todas las funcionalidades operan correctamente sin errores.</text:p>
        </text:list-item>
      </text:list>
      <text:p text:style-name="P3"><text:span text:style-name="Strong_20_Emphasis">Prioridad:</text:span> Alta</text:p>
      <text:h text:style-name="P2" text:outline-level="1">Caso de Prueba N° 13</text:h>
      <text:p text:style-name="P3"><text:span text:style-name="Strong_20_Emphasis">ID:</text:span> CP-013</text:p>
      <text:p text:style-name="P3"><text:span text:style-name="Strong_20_Emphasis">Título:</text:span> Inicio de sesión correcto</text:p>
      <text:p text:style-name="P3"><text:span text:style-name="Strong_20_Emphasis">Precondiciones:</text:span></text:p>
      <text:list text:style-name="L37">
        <text:list-item>
          <text:p text:style-name="P40">Usuario registrado en el sistema. </text:p>
        </text:list-item>
        <text:list-item>
          <text:p text:style-name="P41">Credenciales válidas. </text:p>
        </text:list-item>
      </text:list>
      <text:p text:style-name="P3"><text:span text:style-name="Strong_20_Emphasis">Pasos a reproducir:</text:span></text:p>
      <text:list text:style-name="L38">
        <text:list-item>
          <text:p text:style-name="P42">Ingresar al formulario de inicio de sesión. </text:p>
        </text:list-item>
        <text:list-item>
          <text:p text:style-name="P42">Escribir correo electrónico válido. </text:p>
        </text:list-item>
        <text:list-item>
          <text:p text:style-name="P42">Escribir contraseña correcta. </text:p>
        </text:list-item>
        <text:list-item>
          <text:p text:style-name="P43"><text:soft-page-break/>Presionar "Iniciar Sesión". </text:p>
        </text:list-item>
      </text:list>
      <text:p text:style-name="P3"><text:span text:style-name="Strong_20_Emphasis">Resultado esperado:</text:span></text:p>
      <text:list text:style-name="L39">
        <text:list-item>
          <text:p text:style-name="P44">El usuario accede correctamente a su cuenta. </text:p>
        </text:list-item>
        <text:list-item>
          <text:p text:style-name="P45">Se redirige a la página principal. </text:p>
        </text:list-item>
      </text:list>
      <text:p text:style-name="P3"><text:span text:style-name="Strong_20_Emphasis">Prioridad:</text:span> Crítica</text:p>
      <text:h text:style-name="P46" text:outline-level="1">Caso de Prueba N° 14</text:h>
      <text:p text:style-name="P3"><text:span text:style-name="Strong_20_Emphasis">ID:</text:span> CP-014</text:p>
      <text:p text:style-name="P3"><text:span text:style-name="Strong_20_Emphasis">Título:</text:span> Inicio de sesión con contraseña incorrecta</text:p>
      <text:p text:style-name="P3"><text:span text:style-name="Strong_20_Emphasis">Precondiciones:</text:span></text:p>
      <text:list text:style-name="L40">
        <text:list-item>
          <text:p text:style-name="P47">Usuario registrado. </text:p>
        </text:list-item>
      </text:list>
      <text:p text:style-name="P3"><text:span text:style-name="Strong_20_Emphasis">Pasos a reproducir:</text:span></text:p>
      <text:list text:style-name="L41">
        <text:list-item>
          <text:p text:style-name="P48">Ingresar correo electrónico válido. </text:p>
        </text:list-item>
        <text:list-item>
          <text:p text:style-name="P48">Ingresar contraseña incorrecta. </text:p>
        </text:list-item>
        <text:list-item>
          <text:p text:style-name="P49">Presionar "Iniciar Sesión". </text:p>
        </text:list-item>
      </text:list>
      <text:p text:style-name="P3"><text:span text:style-name="Strong_20_Emphasis">Resultado esperado:</text:span></text:p>
      <text:list text:style-name="L42">
        <text:list-item>
          <text:p text:style-name="P50">El acceso es rechazado. </text:p>
        </text:list-item>
        <text:list-item>
          <text:p text:style-name="P51">Se muestra un mensaje indicando credenciales incorrectas. </text:p>
        </text:list-item>
      </text:list>
      <text:p text:style-name="P3"><text:span text:style-name="Strong_20_Emphasis">Prioridad:</text:span> Crítica</text:p>
      <text:h text:style-name="P46" text:outline-level="1">Caso de Prueba N° 15</text:h>
      <text:p text:style-name="P3"><text:span text:style-name="Strong_20_Emphasis">ID:</text:span> CP-015</text:p>
      <text:p text:style-name="P3"><text:span text:style-name="Strong_20_Emphasis">Título:</text:span> Inicio de sesión con correo inexistente</text:p>
      <text:p text:style-name="P3"><text:span text:style-name="Strong_20_Emphasis">Precondiciones:</text:span></text:p>
      <text:list text:style-name="L43">
        <text:list-item>
          <text:p text:style-name="P52">El correo ingresado no se encuentra registrado. </text:p>
        </text:list-item>
      </text:list>
      <text:p text:style-name="P3"><text:span text:style-name="Strong_20_Emphasis">Pasos a reproducir:</text:span></text:p>
      <text:list text:style-name="L44">
        <text:list-item>
          <text:p text:style-name="P53">Ingresar correo inexistente. </text:p>
        </text:list-item>
        <text:list-item>
          <text:p text:style-name="P53">Ingresar cualquier contraseña. </text:p>
        </text:list-item>
        <text:list-item>
          <text:p text:style-name="P54">Presionar "Iniciar Sesión". </text:p>
        </text:list-item>
      </text:list>
      <text:p text:style-name="P3"><text:span text:style-name="Strong_20_Emphasis">Resultado esperado:</text:span></text:p>
      <text:list text:style-name="L45">
        <text:list-item>
          <text:p text:style-name="P55">El sistema no permite el acceso. </text:p>
        </text:list-item>
        <text:list-item>
          <text:p text:style-name="P56">Se muestra un mensaje de error. </text:p>
        </text:list-item>
      </text:list>
      <text:p text:style-name="P3"><text:span text:style-name="Strong_20_Emphasis">Prioridad:</text:span> Alta</text:p>
      <text:h text:style-name="P46" text:outline-level="1">Caso de Prueba N° 16</text:h>
      <text:p text:style-name="P3"><text:span text:style-name="Strong_20_Emphasis">ID:</text:span> CP-016</text:p>
      <text:p text:style-name="P3"><text:span text:style-name="Strong_20_Emphasis">Título:</text:span> Campos vacíos en inicio de sesión</text:p>
      <text:p text:style-name="P3"><text:soft-page-break/><text:span text:style-name="Strong_20_Emphasis">Precondiciones:</text:span></text:p>
      <text:list text:style-name="L46">
        <text:list-item>
          <text:p text:style-name="P57">Formulario de login disponible. </text:p>
        </text:list-item>
      </text:list>
      <text:p text:style-name="P3"><text:span text:style-name="Strong_20_Emphasis">Pasos a reproducir:</text:span></text:p>
      <text:list text:style-name="L47">
        <text:list-item>
          <text:p text:style-name="P58">Dejar correo vacío. </text:p>
        </text:list-item>
        <text:list-item>
          <text:p text:style-name="P58">Dejar contraseña vacía. </text:p>
        </text:list-item>
        <text:list-item>
          <text:p text:style-name="P59">Presionar "Iniciar Sesión". </text:p>
        </text:list-item>
      </text:list>
      <text:p text:style-name="P3"><text:span text:style-name="Strong_20_Emphasis">Resultado esperado:</text:span></text:p>
      <text:list text:style-name="L48">
        <text:list-item>
          <text:p text:style-name="P60">Se muestran mensajes de validación. </text:p>
        </text:list-item>
        <text:list-item>
          <text:p text:style-name="P61">No se envía la solicitud al servidor. </text:p>
        </text:list-item>
      </text:list>
      <text:p text:style-name="P3"><text:span text:style-name="Strong_20_Emphasis">Prioridad:</text:span> Alta</text:p>
      <text:h text:style-name="P46" text:outline-level="1">Caso de Prueba N° 17</text:h>
      <text:p text:style-name="P3"><text:span text:style-name="Strong_20_Emphasis">ID:</text:span> CP-017</text:p>
      <text:p text:style-name="P3"><text:span text:style-name="Strong_20_Emphasis">Título:</text:span> Cierre de sesión</text:p>
      <text:p text:style-name="P3"><text:span text:style-name="Strong_20_Emphasis">Precondiciones:</text:span></text:p>
      <text:list text:style-name="L49">
        <text:list-item>
          <text:p text:style-name="P62">Usuario autenticado. </text:p>
        </text:list-item>
      </text:list>
      <text:p text:style-name="P3"><text:span text:style-name="Strong_20_Emphasis">Pasos a reproducir:</text:span></text:p>
      <text:list text:style-name="L50">
        <text:list-item>
          <text:p text:style-name="P63">Presionar el botón "Cerrar Sesión". </text:p>
        </text:list-item>
      </text:list>
      <text:p text:style-name="P3"><text:span text:style-name="Strong_20_Emphasis">Resultado esperado:</text:span></text:p>
      <text:list text:style-name="L51">
        <text:list-item>
          <text:p text:style-name="P64">La sesión finaliza correctamente. </text:p>
        </text:list-item>
        <text:list-item>
          <text:p text:style-name="P65">El usuario es redirigido al login. </text:p>
        </text:list-item>
      </text:list>
      <text:p text:style-name="P3"><text:span text:style-name="Strong_20_Emphasis">Prioridad:</text:span> Alta</text:p>
      <text:h text:style-name="P46" text:outline-level="1">Caso de Prueba N° 18</text:h>
      <text:p text:style-name="P3"><text:span text:style-name="Strong_20_Emphasis">ID:</text:span> CP-018</text:p>
      <text:p text:style-name="P3"><text:span text:style-name="Strong_20_Emphasis">Título:</text:span> Recuperación de contraseña con correo válido</text:p>
      <text:p text:style-name="P3"><text:span text:style-name="Strong_20_Emphasis">Precondiciones:</text:span></text:p>
      <text:list text:style-name="L52">
        <text:list-item>
          <text:p text:style-name="P66">Usuario registrado. </text:p>
        </text:list-item>
      </text:list>
      <text:p text:style-name="P3"><text:span text:style-name="Strong_20_Emphasis">Pasos a reproducir:</text:span></text:p>
      <text:list text:style-name="L53">
        <text:list-item>
          <text:p text:style-name="P67">Presionar "Olvidé mi contraseña". </text:p>
        </text:list-item>
        <text:list-item>
          <text:p text:style-name="P67">Ingresar correo registrado. </text:p>
        </text:list-item>
        <text:list-item>
          <text:p text:style-name="P68">Solicitar recuperación. </text:p>
        </text:list-item>
      </text:list>
      <text:p text:style-name="P3"><text:span text:style-name="Strong_20_Emphasis">Resultado esperado:</text:span></text:p>
      <text:list text:style-name="L54">
        <text:list-item>
          <text:p text:style-name="P69">Se envía un correo de recuperación. </text:p>
        </text:list-item>
        <text:list-item>
          <text:p text:style-name="P70">Se informa al usuario que el correo fue enviado. </text:p>
        </text:list-item>
      </text:list>
      <text:p text:style-name="P3"><text:span text:style-name="Strong_20_Emphasis">Prioridad:</text:span> Crítica</text:p>
      <text:h text:style-name="P46" text:outline-level="1"><text:soft-page-break/>Caso de Prueba N° 19</text:h>
      <text:p text:style-name="P3"><text:span text:style-name="Strong_20_Emphasis">ID:</text:span> CP-019</text:p>
      <text:p text:style-name="P3"><text:span text:style-name="Strong_20_Emphasis">Título:</text:span> Recuperación de contraseña con correo inexistente</text:p>
      <text:p text:style-name="P3"><text:span text:style-name="Strong_20_Emphasis">Precondiciones:</text:span></text:p>
      <text:list text:style-name="L55">
        <text:list-item>
          <text:p text:style-name="P71">Correo no registrado. </text:p>
        </text:list-item>
      </text:list>
      <text:p text:style-name="P3"><text:span text:style-name="Strong_20_Emphasis">Pasos a reproducir:</text:span></text:p>
      <text:list text:style-name="L56">
        <text:list-item>
          <text:p text:style-name="P72">Acceder a recuperación de contraseña. </text:p>
        </text:list-item>
        <text:list-item>
          <text:p text:style-name="P72">Ingresar correo inexistente. </text:p>
        </text:list-item>
        <text:list-item>
          <text:p text:style-name="P73">Solicitar recuperación. </text:p>
        </text:list-item>
      </text:list>
      <text:p text:style-name="P3"><text:span text:style-name="Strong_20_Emphasis">Resultado esperado:</text:span></text:p>
      <text:list text:style-name="L57">
        <text:list-item>
          <text:p text:style-name="P74">Se muestra mensaje informativo. </text:p>
        </text:list-item>
        <text:list-item>
          <text:p text:style-name="P75">No se genera recuperación para cuentas inexistentes. </text:p>
        </text:list-item>
      </text:list>
      <text:p text:style-name="P3"><text:span text:style-name="Strong_20_Emphasis">Prioridad:</text:span> Alta</text:p>
      <text:h text:style-name="P76" text:outline-level="1">Caso de Prueba N° 20</text:h>
      <text:p text:style-name="P3"><text:span text:style-name="Strong_20_Emphasis">ID:</text:span> CP-020</text:p>
      <text:p text:style-name="P3"><text:span text:style-name="Strong_20_Emphasis">Título:</text:span> Cambio de contraseña mediante enlace de recuperación</text:p>
      <text:p text:style-name="P3"><text:span text:style-name="Strong_20_Emphasis">Precondiciones:</text:span></text:p>
      <text:list text:style-name="L58">
        <text:list-item>
          <text:p text:style-name="P77">Usuario recibió correo de recuperación. </text:p>
        </text:list-item>
      </text:list>
      <text:p text:style-name="P3"><text:span text:style-name="Strong_20_Emphasis">Pasos a reproducir:</text:span></text:p>
      <text:list text:style-name="L59">
        <text:list-item>
          <text:p text:style-name="P78">Abrir enlace recibido. </text:p>
        </text:list-item>
        <text:list-item>
          <text:p text:style-name="P78">Ingresar nueva contraseña. </text:p>
        </text:list-item>
        <text:list-item>
          <text:p text:style-name="P78">Confirmar contraseña. </text:p>
        </text:list-item>
        <text:list-item>
          <text:p text:style-name="P79">Guardar cambios. </text:p>
        </text:list-item>
      </text:list>
      <text:p text:style-name="P3"><text:span text:style-name="Strong_20_Emphasis">Resultado esperado:</text:span></text:p>
      <text:list text:style-name="L60">
        <text:list-item>
          <text:p text:style-name="P80">Contraseña actualizada correctamente. </text:p>
        </text:list-item>
        <text:list-item>
          <text:p text:style-name="P81">Usuario puede iniciar sesión con la nueva contraseña. </text:p>
        </text:list-item>
      </text:list>
      <text:p text:style-name="P3"><text:span text:style-name="Strong_20_Emphasis">Prioridad:</text:span> Crítica</text:p>
      <text:h text:style-name="P46" text:outline-level="1">Caso de Prueba N° 21</text:h>
      <text:p text:style-name="P3"><text:span text:style-name="Strong_20_Emphasis">ID:</text:span> CP-021</text:p>
      <text:p text:style-name="P3"><text:span text:style-name="Strong_20_Emphasis">Título:</text:span> Enlace de recuperación expirado</text:p>
      <text:p text:style-name="P3"><text:span text:style-name="Strong_20_Emphasis">Precondiciones:</text:span></text:p>
      <text:list text:style-name="L61">
        <text:list-item>
          <text:p text:style-name="P82">Token de recuperación vencido. </text:p>
        </text:list-item>
      </text:list>
      <text:p text:style-name="P3"><text:span text:style-name="Strong_20_Emphasis">Pasos a reproducir:</text:span></text:p>
      <text:list text:style-name="L62">
        <text:list-item>
          <text:p text:style-name="P83">Abrir enlace expirado. </text:p>
        </text:list-item>
      </text:list>
      <text:p text:style-name="P3"><text:soft-page-break/><text:span text:style-name="Strong_20_Emphasis">Resultado esperado:</text:span></text:p>
      <text:list text:style-name="L63">
        <text:list-item>
          <text:p text:style-name="P84">El sistema informa que el enlace ha expirado. </text:p>
        </text:list-item>
        <text:list-item>
          <text:p text:style-name="P85">Se solicita generar una nueva recuperación. </text:p>
        </text:list-item>
      </text:list>
      <text:p text:style-name="P3"><text:span text:style-name="Strong_20_Emphasis">Prioridad:</text:span> Alta</text:p>
      <text:h text:style-name="P46" text:outline-level="1">Caso de Prueba N° 22</text:h>
      <text:p text:style-name="P3"><text:span text:style-name="Strong_20_Emphasis">ID:</text:span> CP-022</text:p>
      <text:p text:style-name="P3"><text:span text:style-name="Strong_20_Emphasis">Título:</text:span> Registro de usuario nuevo</text:p>
      <text:p text:style-name="P3"><text:span text:style-name="Strong_20_Emphasis">Precondiciones:</text:span></text:p>
      <text:list text:style-name="L64">
        <text:list-item>
          <text:p text:style-name="P86">Usuario no registrado. </text:p>
        </text:list-item>
      </text:list>
      <text:p text:style-name="P3"><text:span text:style-name="Strong_20_Emphasis">Pasos a reproducir:</text:span></text:p>
      <text:list text:style-name="L65">
        <text:list-item>
          <text:p text:style-name="P87">Acceder al formulario de registro. </text:p>
        </text:list-item>
        <text:list-item>
          <text:p text:style-name="P87">Completar nombre, correo y contraseña. </text:p>
        </text:list-item>
        <text:list-item>
          <text:p text:style-name="P88">Confirmar registro. </text:p>
        </text:list-item>
      </text:list>
      <text:p text:style-name="P3"><text:span text:style-name="Strong_20_Emphasis">Resultado esperado:</text:span></text:p>
      <text:list text:style-name="L66">
        <text:list-item>
          <text:p text:style-name="P89">Cuenta creada exitosamente. </text:p>
        </text:list-item>
        <text:list-item>
          <text:p text:style-name="P90">Usuario registrado en la base de datos. </text:p>
        </text:list-item>
      </text:list>
      <text:p text:style-name="P3"><text:span text:style-name="Strong_20_Emphasis">Prioridad:</text:span> Crítica</text:p>
      <text:h text:style-name="P46" text:outline-level="1">Caso de Prueba N° 23</text:h>
      <text:p text:style-name="P3"><text:span text:style-name="Strong_20_Emphasis">ID:</text:span> CP-023</text:p>
      <text:p text:style-name="P3"><text:span text:style-name="Strong_20_Emphasis">Título:</text:span> Registro con correo ya existente</text:p>
      <text:p text:style-name="P3"><text:span text:style-name="Strong_20_Emphasis">Precondiciones:</text:span></text:p>
      <text:list text:style-name="L67">
        <text:list-item>
          <text:p text:style-name="P91">Existe una cuenta con ese correo. </text:p>
        </text:list-item>
      </text:list>
      <text:p text:style-name="P3"><text:span text:style-name="Strong_20_Emphasis">Pasos a reproducir:</text:span></text:p>
      <text:list text:style-name="L68">
        <text:list-item>
          <text:p text:style-name="P92">Completar formulario de registro utilizando un correo ya registrado. </text:p>
        </text:list-item>
        <text:list-item>
          <text:p text:style-name="P93">Confirmar registro. </text:p>
        </text:list-item>
      </text:list>
      <text:p text:style-name="P3"><text:span text:style-name="Strong_20_Emphasis">Resultado esperado:</text:span></text:p>
      <text:list text:style-name="L69">
        <text:list-item>
          <text:p text:style-name="P94">El sistema rechaza el registro. </text:p>
        </text:list-item>
        <text:list-item>
          <text:p text:style-name="P95">Se informa que el correo ya está en uso. </text:p>
        </text:list-item>
      </text:list>
      <text:p text:style-name="P3"><text:span text:style-name="Strong_20_Emphasis">Prioridad:</text:span> Alta</text:p>
      <text:h text:style-name="P46" text:outline-level="1">Caso de Prueba N° 24</text:h>
      <text:p text:style-name="P3"><text:span text:style-name="Strong_20_Emphasis">ID:</text:span> CP-024</text:p>
      <text:p text:style-name="P3"><text:span text:style-name="Strong_20_Emphasis">Título:</text:span> Validación de contraseña mínima</text:p>
      <text:p text:style-name="P3"><text:span text:style-name="Strong_20_Emphasis">Precondiciones:</text:span></text:p>
      <text:list text:style-name="L70">
        <text:list-item>
          <text:p text:style-name="P96">Formulario de registro disponible. </text:p>
        </text:list-item>
      </text:list>
      <text:p text:style-name="P3"><text:soft-page-break/><text:span text:style-name="Strong_20_Emphasis">Pasos a reproducir:</text:span></text:p>
      <text:list text:style-name="L71">
        <text:list-item>
          <text:p text:style-name="P97">Ingresar una contraseña menor a la longitud permitida. </text:p>
        </text:list-item>
        <text:list-item>
          <text:p text:style-name="P98">Intentar registrarse. </text:p>
        </text:list-item>
      </text:list>
      <text:p text:style-name="P3"><text:span text:style-name="Strong_20_Emphasis">Resultado esperado:</text:span></text:p>
      <text:list text:style-name="L72">
        <text:list-item>
          <text:p text:style-name="P99">El sistema muestra un mensaje de validación. </text:p>
        </text:list-item>
        <text:list-item>
          <text:p text:style-name="P100">No se crea la cuenta. </text:p>
        </text:list-item>
      </text:list>
      <text:p text:style-name="P3"><text:span text:style-name="Strong_20_Emphasis">Prioridad:</text:span> Alta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9T18:54:33.493682078</meta:creation-date>
    <dc:date>2026-06-04T20:55:15.983100807</dc:date>
    <meta:editing-duration>PT5M48S</meta:editing-duration>
    <meta:editing-cycles>2</meta:editing-cycles>
    <meta:generator>LibreOffice/25.2.7.2$Linux_X86_64 LibreOffice_project/520$Build-2</meta:generator>
    <meta:print-date>2026-06-04T20:49:59.378902437</meta:print-date>
    <meta:printed-by>Archivos PDF</meta:printed-by>
    <meta:document-statistic meta:table-count="0" meta:image-count="0" meta:object-count="0" meta:page-count="10" meta:paragraph-count="299" meta:word-count="1258" meta:character-count="7996" meta:non-whitespace-character-count="7098"/>
  </office:meta>
</office:document-meta>
</file>