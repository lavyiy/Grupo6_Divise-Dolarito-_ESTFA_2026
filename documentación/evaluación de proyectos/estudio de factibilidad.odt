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imbus Roman No9 L" svg:font-family="'Nimbus Roman No9 L'" style:font-family-generic="roman" style:font-pitch="variable"/>
    <style:font-face style:name="OpenSymbol" svg:font-family="OpenSymbol" style:font-charset="x-symbol"/>
    <style:font-face style:name="StarSymbol" svg:font-family="StarSymbol"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adornments="Normal" style:font-pitch="variable" style:font-charset="x-symbol"/>
  </office:font-face-decls>
  <office:automatic-styles>
    <style:style style:name="Tabla1" style:family="table">
      <style:table-properties style:width="15.801cm" fo:margin-left="0cm" fo:margin-top="0cm" fo:margin-bottom="0cm" table:align="left" style:writing-mode="page"/>
    </style:style>
    <style:style style:name="Tabla1.A" style:family="table-column">
      <style:table-column-properties style:column-width="2.633cm"/>
    </style:style>
    <style:style style:name="Tabla1.B" style:family="table-column">
      <style:table-column-properties style:column-width="2.632cm"/>
    </style:style>
    <style:style style:name="Tabla1.C" style:family="table-column">
      <style:table-column-properties style:column-width="2.635cm"/>
    </style:style>
    <style:style style:name="Tabla1.1" style:family="table-row">
      <style:table-row-properties style:min-row-height="0.356cm" fo:keep-together="auto"/>
    </style:style>
    <style:style style:name="Tabla1.A1" style:family="table-cell">
      <style:table-cell-properties fo:background-color="#bfbfbf" fo:padding-left="0.123cm" fo:padding-right="0.123cm" fo:padding-top="0cm" fo:padding-bottom="0cm" fo:border="0.5pt solid #000000">
        <style:background-image/>
      </style:table-cell-properties>
    </style:style>
    <style:style style:name="Tabla1.2" style:family="table-row">
      <style:table-row-properties style:min-row-height="0.552cm" fo:keep-together="auto"/>
    </style:style>
    <style:style style:name="Tabla1.A2" style:family="table-cell">
      <style:table-cell-properties style:vertical-align="middle" fo:padding-left="0.123cm" fo:padding-right="0.123cm" fo:padding-top="0cm" fo:padding-bottom="0cm" fo:border="0.5pt solid #000000"/>
    </style:style>
    <style:style style:name="Tabla1.A3"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P1" style:family="paragraph" style:parent-style-name="Standard">
      <style:paragraph-properties>
        <style:tab-stops>
          <style:tab-stop style:position="7.5cm" style:type="center"/>
        </style:tab-stops>
      </style:paragraph-properties>
    </style:style>
    <style:style style:name="P2" style:family="paragraph" style:parent-style-name="PSI_20_-_20_Título_20_2">
      <style:text-properties officeooo:rsid="0009cd4d" officeooo:paragraph-rsid="0009cd4d"/>
    </style:style>
    <style:style style:name="P3" style:family="paragraph" style:parent-style-name="Contents_20_Heading">
      <style:paragraph-properties>
        <style:tab-stops>
          <style:tab-stop style:position="10.502cm"/>
        </style:tab-stops>
      </style:paragraph-properties>
    </style:style>
    <style:style style:name="P4" style:family="paragraph" style:parent-style-name="Standard">
      <style:paragraph-properties>
        <style:tab-stops>
          <style:tab-stop style:position="10.502cm"/>
        </style:tab-stops>
      </style:paragraph-properties>
    </style:style>
    <style:style style:name="P5" style:family="paragraph" style:parent-style-name="PSI_20_-_20_Comentario">
      <style:paragraph-properties fo:margin-top="0cm" fo:margin-bottom="0cm" style:contextual-spacing="false" fo:break-before="page"/>
    </style:style>
    <style:style style:name="P6" style:family="paragraph" style:parent-style-name="Standard">
      <style:paragraph-properties fo:margin-left="0cm" fo:text-indent="0cm" style:auto-text-indent="false"/>
    </style:style>
    <style:style style:name="P7" style:family="paragraph" style:parent-style-name="Standard">
      <style:paragraph-properties fo:margin-left="0cm" fo:margin-top="0cm" fo:margin-bottom="0cm" style:contextual-spacing="false" fo:text-indent="0cm" style:auto-text-indent="false" fo:break-before="page"/>
    </style:style>
    <style:style style:name="P8" style:family="paragraph" style:parent-style-name="PSI_20_-_20_Comentario">
      <style:text-properties officeooo:paragraph-rsid="000aacd8"/>
    </style:style>
    <style:style style:name="P9" style:family="paragraph" style:parent-style-name="PSI_20_-_20_Comentario_20_en_20_Tabla">
      <style:text-properties fo:color="#666666" loext:opacity="100%" style:font-name="Arial" fo:font-size="12pt" fo:background-color="#ffffff" style:font-name-asian="Calibri1" style:font-size-asian="12pt" style:font-name-complex="Times New Roman1"/>
    </style:style>
    <style:style style:name="P10" style:family="paragraph" style:parent-style-name="PSI_20_-_20_Título">
      <style:paragraph-properties fo:margin-top="0cm" fo:margin-bottom="0.529cm" style:contextual-spacing="true" fo:break-before="page"/>
    </style:style>
    <style:style style:name="P11" style:family="paragraph" style:parent-style-name="PSI_20_-_20_Comentario_20_en_20_Tabla">
      <style:text-properties style:font-name="Arial" fo:font-size="12pt" style:font-name-asian="Calibri1" style:font-size-asian="12pt" style:font-name-complex="Times New Roman1"/>
    </style:style>
    <style:style style:name="P12" style:family="paragraph" style:parent-style-name="PSI_20_-_20_Comentario_20_en_20_Tabla">
      <style:text-properties style:font-name="Arial" fo:font-size="12pt" officeooo:rsid="000bd223" officeooo:paragraph-rsid="000bd223" style:font-name-asian="Calibri1" style:font-size-asian="12pt" style:font-name-complex="Times New Roman1"/>
    </style:style>
    <style:style style:name="P13" style:family="paragraph" style:parent-style-name="Table_20_Contents">
      <style:paragraph-properties fo:text-align="center" style:justify-single-word="false"/>
    </style:style>
    <style:style style:name="P14" style:family="paragraph" style:parent-style-name="PSI_20_-_20_Normal">
      <style:paragraph-properties fo:margin-left="0cm" fo:text-indent="0cm" style:auto-text-indent="false"/>
    </style:style>
    <style:style style:name="P15" style:family="paragraph" style:parent-style-name="PSI_20_-_20_Normal">
      <style:paragraph-properties fo:margin-left="0cm" fo:text-indent="0cm" style:auto-text-indent="false"/>
      <style:text-properties fo:color="#548dd4" loext:opacity="100%" fo:font-style="italic" style:font-style-asian="italic"/>
    </style:style>
    <style:style style:name="P16" style:family="paragraph" style:parent-style-name="Text_20_body">
      <style:text-properties fo:font-size="12pt" fo:language="es" fo:country="ES" fo:font-weight="bold" style:font-size-asian="12pt" style:font-weight-asian="bold" style:font-name-complex="Arial2"/>
    </style:style>
    <style:style style:name="P17" style:family="paragraph" style:parent-style-name="Text_20_body">
      <style:text-properties fo:font-size="12pt" fo:language="es" fo:country="ES" style:font-size-asian="12pt" style:font-name-complex="Arial2"/>
    </style:style>
    <style:style style:name="P18" style:family="paragraph" style:parent-style-name="Text_20_body">
      <style:text-properties fo:font-size="12pt" fo:letter-spacing="-0.005cm" fo:language="es" fo:country="ES" style:font-size-asian="12pt" style:font-name-complex="Arial2"/>
    </style:style>
    <style:style style:name="P19" style:family="paragraph" style:parent-style-name="Header">
      <style:paragraph-properties fo:margin-left="0cm" fo:text-indent="0cm" style:auto-text-indent="false">
        <style:tab-stops>
          <style:tab-stop style:position="13.653cm"/>
        </style:tab-stops>
      </style:paragraph-properties>
    </style:style>
    <style:style style:name="P20" style:family="paragraph" style:parent-style-name="No_20_Spacing">
      <style:text-properties style:font-name="Cambria" fo:font-size="36pt" style:font-size-asian="36pt" style:font-size-complex="36pt"/>
    </style:style>
    <style:style style:name="P21" style:family="paragraph" style:parent-style-name="No_20_Spacing">
      <style:text-properties fo:language="es" fo:country="AR" officeooo:rsid="0009cd4d" officeooo:paragraph-rsid="0009cd4d"/>
    </style:style>
    <style:style style:name="P22" style:family="paragraph" style:parent-style-name="PSI_20_-_20_Comentario">
      <style:text-properties style:font-name="Calibri" style:font-name-asian="Calibri1" style:font-name-complex="Times New Roman1"/>
    </style:style>
    <style:style style:name="P23" style:family="paragraph" style:parent-style-name="PSI_20_-_20_Comentario">
      <style:text-properties style:font-name="Calibri" officeooo:paragraph-rsid="000bac2a" style:font-name-asian="Calibri1" style:font-name-complex="Times New Roman1"/>
    </style:style>
    <style:style style:name="P24" style:family="paragraph" style:parent-style-name="PSI_20_-_20_Comentario" style:list-style-name="L1">
      <style:text-properties officeooo:paragraph-rsid="000bac2a"/>
    </style:style>
    <style:style style:name="P25" style:family="paragraph" style:parent-style-name="PSI_20_-_20_Comentario">
      <style:paragraph-properties fo:margin-left="0.192cm" fo:text-indent="0cm" style:auto-text-indent="false"/>
      <style:text-properties officeooo:paragraph-rsid="000bac2a"/>
    </style:style>
    <style:style style:name="P26" style:family="paragraph" style:parent-style-name="PSI_20_-_20_Comentario">
      <style:paragraph-properties fo:margin-left="0.192cm" fo:text-indent="0cm" style:auto-text-indent="false"/>
    </style:style>
    <style:style style:name="P27" style:family="paragraph" style:parent-style-name="PSI_20_-_20_Comentario">
      <style:paragraph-properties fo:margin-left="0cm" fo:text-indent="0cm" style:auto-text-indent="false"/>
      <style:text-properties style:font-name="Arial" fo:font-size="14pt" fo:language="es" fo:country="ES" fo:font-style="normal" fo:font-weight="bold" style:font-size-asian="14pt" style:font-style-asian="normal" style:font-weight-asian="bold" style:font-name-complex="Arial2"/>
    </style:style>
    <style:style style:name="P28" style:family="paragraph" style:parent-style-name="PSI_20_-_20_Comentario_20__2b__20_Viñeta" style:list-style-name="WWNum10">
      <style:paragraph-properties fo:margin-left="0.635cm" fo:text-indent="-0.011cm" style:auto-text-indent="false"/>
      <style:text-properties officeooo:paragraph-rsid="0009e2a8"/>
    </style:style>
    <style:style style:name="P29" style:family="paragraph" style:parent-style-name="PSI_20_-_20_Comentario_20__2b__20_Viñeta" style:list-style-name="WWNum10">
      <style:paragraph-properties fo:margin-left="0.635cm" fo:text-indent="-0.011cm" style:auto-text-indent="false"/>
    </style:style>
    <style:style style:name="P30" style:family="paragraph" style:parent-style-name="PSI_20_-_20_Comentario_20__2b__20_Viñeta" style:list-style-name="">
      <style:paragraph-properties fo:margin-left="0.635cm" fo:text-indent="0cm" style:auto-text-indent="false"/>
    </style:style>
    <style:style style:name="P31" style:family="paragraph" style:parent-style-name="PSI_20_-_20_Título_20_2">
      <style:text-properties officeooo:paragraph-rsid="000bac2a"/>
    </style:style>
    <style:style style:name="P32" style:family="paragraph" style:parent-style-name="PSI_20_-_20_Título_20_2">
      <style:paragraph-properties fo:margin-top="0cm" fo:margin-bottom="0cm" style:contextual-spacing="false"/>
    </style:style>
    <style:style style:name="P33" style:family="paragraph" style:parent-style-name="Standard">
      <style:paragraph-properties fo:margin-top="0cm" fo:margin-bottom="0cm" style:contextual-spacing="false">
        <style:tab-stops>
          <style:tab-stop style:position="7.5cm" style:type="center"/>
        </style:tab-stops>
      </style:paragraph-properties>
      <style:text-properties fo:language="es" fo:country="AR" officeooo:rsid="0009cd4d" officeooo:paragraph-rsid="0009cd4d"/>
    </style:style>
    <style:style style:name="P34" style:family="paragraph" style:parent-style-name="Standard">
      <style:paragraph-properties fo:margin-left="0cm" fo:margin-top="0cm" fo:margin-bottom="0cm" style:contextual-spacing="false" fo:line-height="100%" fo:text-indent="0cm" style:auto-text-indent="false"/>
      <style:text-properties fo:language="es" fo:country="AR"/>
    </style:style>
    <style:style style:name="P35" style:family="paragraph" style:parent-style-name="Standard">
      <style:paragraph-properties fo:hyphenation-ladder-count="no-limit">
        <style:tab-stops>
          <style:tab-stop style:position="-1.27cm"/>
          <style:tab-stop style:position="1.27cm"/>
          <style:tab-stop style:position="2.54cm"/>
          <style:tab-stop style:position="3.81cm"/>
          <style:tab-stop style:position="5.08cm"/>
          <style:tab-stop style:position="5.715cm"/>
          <style:tab-stop style:position="6.35cm"/>
          <style:tab-stop style:position="6.826cm"/>
          <style:tab-stop style:position="7.62cm"/>
        </style:tab-stops>
      </style:paragraph-properties>
      <style:text-properties fo:language="es" fo:country="AR" style:font-name-complex="Arial2"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text-align="justify" style:justify-single-word="false" fo:text-indent="0cm" style:auto-text-indent="false">
        <style:tab-stops>
          <style:tab-stop style:position="0cm"/>
        </style:tab-stops>
      </style:paragraph-properties>
      <style:text-properties fo:color="#548dd4" loext:opacity="100%" style:font-name="Calibri" fo:language="es" fo:country="AR" fo:font-style="italic" style:font-name-asian="Calibri1" style:font-style-asian="italic" style:font-name-complex="Times New Roman1"/>
    </style:style>
    <style:style style:name="P37" style:family="paragraph" style:parent-style-name="Standard">
      <style:paragraph-properties fo:margin-left="0cm" fo:text-align="justify" style:justify-single-word="false" fo:text-indent="0cm" style:auto-text-indent="false">
        <style:tab-stops>
          <style:tab-stop style:position="0cm"/>
        </style:tab-stops>
      </style:paragraph-properties>
      <style:text-properties fo:color="#548dd4" loext:opacity="100%" fo:language="es" fo:country="AR" fo:font-style="italic" style:font-style-asian="italic"/>
    </style:style>
    <style:style style:name="P38" style:family="paragraph" style:parent-style-name="Standard">
      <style:paragraph-properties fo:margin-left="0cm" fo:text-align="justify" style:justify-single-word="false" fo:text-indent="0cm" style:auto-text-indent="false">
        <style:tab-stops>
          <style:tab-stop style:position="0cm"/>
        </style:tab-stops>
      </style:paragraph-properties>
    </style:style>
    <style:style style:name="P39" style:family="paragraph" style:parent-style-name="Standard">
      <style:paragraph-properties fo:margin-left="0cm" fo:margin-top="0cm" fo:margin-bottom="0cm" style:contextual-spacing="false" fo:line-height="100%" fo:text-align="justify" style:justify-single-word="false" fo:text-indent="0cm" style:auto-text-indent="false"/>
      <style:text-properties fo:color="#365f91" loext:opacity="100%" style:font-name="Cambria" fo:font-size="14pt" fo:font-weight="bold" style:font-size-asian="14pt" style:font-weight-asian="bold" style:font-size-complex="14pt" style:font-weight-complex="bold">
        <loext:char-complex-color loext:theme-type="accent1" loext:color-type="theme">
          <loext:transformation loext:type="shade" loext:value="2509"/>
        </loext:char-complex-color>
      </style:text-properties>
    </style:style>
    <style:style style:name="P40" style:family="paragraph" style:parent-style-name="Standard">
      <style:paragraph-properties fo:hyphenation-ladder-count="no-limit">
        <style:tab-stops>
          <style:tab-stop style:position="-1.27cm"/>
          <style:tab-stop style:position="1.251cm"/>
          <style:tab-stop style:position="2.54cm"/>
          <style:tab-stop style:position="3.81cm"/>
          <style:tab-stop style:position="5.08cm"/>
          <style:tab-stop style:position="5.715cm"/>
          <style:tab-stop style:position="6.35cm"/>
          <style:tab-stop style:position="6.826cm"/>
          <style:tab-stop style:position="7.62cm"/>
        </style:tab-stops>
      </style:paragraph-properties>
      <style:text-properties style:font-name-complex="Arial2" fo:hyphenate="false" fo:hyphenation-remain-char-count="2" fo:hyphenation-push-char-count="2" loext:hyphenation-no-caps="false" loext:hyphenation-no-last-word="false" loext:hyphenation-word-char-count="5" loext:hyphenation-zone="no-limit"/>
    </style:style>
    <style:style style:name="P41" style:family="paragraph">
      <loext:graphic-properties draw:fill="solid" draw:fill-color="#ffffff"/>
      <style:paragraph-properties fo:text-align="center"/>
    </style:style>
    <style:style style:name="P42" style:family="paragraph">
      <loext:graphic-properties draw:fill="solid" draw:fill-color="#4bacc6"/>
      <style:paragraph-properties fo:text-align="center"/>
    </style:style>
    <style:style style:name="P43" style:family="paragraph">
      <loext:graphic-properties draw:fill="none"/>
      <style:text-properties fo:font-size="11pt"/>
    </style:style>
    <style:style style:name="P44" style:family="paragraph">
      <loext:graphic-properties draw:fill="none"/>
      <style:paragraph-properties fo:text-align="center"/>
      <style:text-properties fo:font-size="11pt"/>
    </style:style>
    <style:style style:name="T1" style:family="text">
      <style:text-properties style:font-name="Cambria"/>
    </style:style>
    <style:style style:name="T2" style:family="text">
      <style:text-properties style:font-name="Cambria" fo:language="es" fo:country="AR"/>
    </style:style>
    <style:style style:name="T3" style:family="text">
      <style:text-properties style:font-name="Cambria" style:font-size-complex="18pt"/>
    </style:style>
    <style:style style:name="T4" style:family="text">
      <style:text-properties style:font-name="Cambria" officeooo:rsid="0009cd4d" style:font-size-complex="18pt"/>
    </style:style>
    <style:style style:name="T5" style:family="text">
      <style:text-properties style:font-name="Cambria" style:font-name-complex="Cambria1"/>
    </style:style>
    <style:style style:name="T6" style:family="text">
      <style:text-properties style:font-name="Cambria" fo:font-size="36pt" style:font-size-asian="36pt" style:font-size-complex="36pt"/>
    </style:style>
    <style:style style:name="T7" style:family="text">
      <style:text-properties style:font-name="Cambria" fo:font-size="36pt" fo:language="es" fo:country="AR" style:font-size-asian="36pt" style:font-size-complex="36pt"/>
    </style:style>
    <style:style style:name="T8" style:family="text">
      <style:text-properties style:font-name="Cambria" fo:font-size="18pt" style:font-size-asian="18pt" style:font-size-complex="18pt"/>
    </style:style>
    <style:style style:name="T9" style:family="text">
      <style:text-properties style:font-name="Cambria" fo:font-size="18pt" officeooo:rsid="0009cd4d" style:font-size-asian="18pt" style:font-size-complex="18pt"/>
    </style:style>
    <style:style style:name="T10" style:family="text">
      <style:text-properties style:font-name="Cambria" style:font-name-asian="Times New Roman1" style:font-name-complex="Times New Roman1"/>
    </style:style>
    <style:style style:name="T11" style:family="text">
      <style:text-properties fo:language="es" fo:country="AR"/>
    </style:style>
    <style:style style:name="T12" style:family="text">
      <style:text-properties fo:language="es" fo:country="AR" officeooo:rsid="0009cd4d"/>
    </style:style>
    <style:style style:name="T13" style:family="text">
      <style:text-properties fo:language="es" fo:country="AR" style:font-name-complex="Arial2"/>
    </style:style>
    <style:style style:name="T14" style:family="text">
      <style:text-properties text:display="true"/>
    </style:style>
    <style:style style:name="T15" style:family="text">
      <style:text-properties fo:font-size="11pt" fo:font-weight="normal" style:font-size-asian="11pt" style:language-asian="es" style:country-asian="ES" style:font-weight-asian="normal" style:font-size-complex="11pt" style:font-weight-complex="normal"/>
    </style:style>
    <style:style style:name="T16" style:family="text">
      <style:text-properties fo:font-size="11pt" fo:font-style="normal" style:font-size-asian="11pt" style:language-asian="es" style:country-asian="ES" style:font-style-asian="normal" style:font-size-complex="11pt" style:font-style-complex="normal"/>
    </style:style>
    <style:style style:name="T17" style:family="text">
      <style:text-properties fo:font-size="11pt" style:font-size-asian="11pt" style:language-asian="es" style:country-asian="ES" style:font-size-complex="11pt"/>
    </style:style>
    <style:style style:name="T18" style:family="text">
      <style:text-properties fo:color="#548dd4" loext:opacity="100%" style:font-name="Calibri" fo:language="es" fo:country="AR" fo:font-style="italic" style:font-name-asian="Calibri1" style:font-style-asian="italic" style:font-name-complex="Times New Roman1"/>
    </style:style>
    <style:style style:name="T19" style:family="text">
      <style:text-properties fo:color="#548dd4" loext:opacity="100%" style:font-name="Calibri" fo:language="es" fo:country="AR" fo:font-style="italic" officeooo:rsid="0009cd4d" style:font-name-asian="Calibri1" style:font-style-asian="italic" style:font-name-complex="Times New Roman1"/>
    </style:style>
    <style:style style:name="T20" style:family="text">
      <style:text-properties fo:color="#548dd4" loext:opacity="100%" style:font-name="Calibri" fo:font-style="italic" style:font-name-asian="Calibri1" style:font-style-asian="italic" style:font-name-complex="Times New Roman1"/>
    </style:style>
    <style:style style:name="T21" style:family="text">
      <style:text-properties fo:color="#548dd4" loext:opacity="100%" style:font-name="Calibri" fo:font-style="italic" fo:font-weight="bold" style:font-name-asian="Calibri1" style:font-style-asian="italic" style:font-name-complex="Times New Roman1"/>
    </style:style>
    <style:style style:name="T22" style:family="text">
      <style:text-properties fo:color="#548dd4" loext:opacity="100%" fo:language="es" fo:country="AR" fo:font-style="italic" style:font-style-asian="italic"/>
    </style:style>
    <style:style style:name="T23" style:family="text">
      <style:text-properties fo:color="#548dd4" loext:opacity="100%" fo:font-style="italic" style:font-style-asian="italic"/>
    </style:style>
    <style:style style:name="T24" style:family="text">
      <style:text-properties fo:color="#365f91" loext:opacity="100%" style:font-name="Cambria" fo:font-size="14pt" fo:font-weight="bold" style:font-size-asian="14pt" style:font-weight-asian="bold" style:font-size-complex="14pt" style:font-weight-complex="bold">
        <loext:char-complex-color loext:theme-type="accent1" loext:color-type="theme">
          <loext:transformation loext:type="shade" loext:value="2509"/>
        </loext:char-complex-color>
      </style:text-properties>
    </style:style>
    <style:style style:name="T25" style:family="text">
      <style:text-properties fo:font-size="12pt" fo:language="es" fo:country="ES" fo:font-weight="bold" style:font-size-asian="12pt" style:font-weight-asian="bold" style:font-name-complex="Arial2"/>
    </style:style>
    <style:style style:name="T26" style:family="text">
      <style:text-properties fo:font-size="12pt" fo:language="es" fo:country="ES" style:font-size-asian="12pt" style:font-name-complex="Arial2"/>
    </style:style>
    <style:style style:name="T27" style:family="text">
      <style:text-properties fo:font-size="12pt" fo:letter-spacing="-0.005cm" fo:language="es" fo:country="ES" style:font-size-asian="12pt" style:font-name-complex="Arial2"/>
    </style:style>
    <style:style style:name="T28" style:family="text">
      <style:text-properties style:font-name="Calibri" style:font-name-asian="Calibri1" style:font-name-complex="Times New Roman1"/>
    </style:style>
    <style:style style:name="T29" style:family="text">
      <style:text-properties style:font-name="Calibri" officeooo:rsid="000a9691" style:font-name-asian="Calibri1" style:font-name-complex="Times New Roman1"/>
    </style:style>
    <style:style style:name="T30" style:family="text">
      <style:text-properties style:font-name="Calibri" fo:font-weight="bold" style:font-name-asian="Calibri1" style:font-name-complex="Times New Roman1"/>
    </style:style>
    <style:style style:name="T31" style:family="text">
      <style:text-properties fo:font-weight="bold"/>
    </style:style>
    <style:style style:name="T32" style:family="text">
      <style:text-properties fo:font-weight="bold" style:font-weight-asian="bold"/>
    </style:style>
    <style:style style:name="T33" style:family="text">
      <style:text-properties fo:font-size="16pt" fo:letter-spacing="-0.007cm" style:font-size-asian="16pt"/>
    </style:style>
    <style:style style:name="T34" style:family="text">
      <style:text-properties fo:color="#4f81bd" loext:opacity="100%" style:font-name="Cambria" fo:font-size="13pt" fo:language="es" fo:country="AR" fo:font-weight="bold" style:font-size-asian="13pt" style:font-weight-asian="bold" style:font-size-complex="13pt" style:font-weight-complex="bold">
        <loext:char-complex-color loext:theme-type="accent1" loext:color-type="theme"/>
      </style:text-properties>
    </style:style>
    <style:style style:name="T35" style:family="text">
      <style:text-properties style:font-name-complex="Arial2"/>
    </style:style>
    <style:style style:name="T36" style:family="text">
      <style:text-properties fo:color="#365f91" loext:opacity="100%" style:font-name="Cambria" style:font-name-asian="Times New Roman1" style:font-name-complex="Times New Roman1"/>
    </style:style>
    <style:style style:name="T37" style:family="text">
      <style:text-properties fo:color="#4f81bd" loext:opacity="100%" style:font-name="Cambria" style:font-name-asian="Times New Roman1" style:font-name-complex="Times New Roman1"/>
    </style:style>
    <style:style style:name="T38" style:family="text">
      <style:text-properties style:font-name="Arial" fo:font-size="10pt" fo:language="es" fo:country="AR" fo:font-weight="bold" style:font-size-asian="10pt" style:font-weight-asian="bold" style:font-size-complex="10pt" style:font-weight-complex="bold"/>
    </style:style>
    <style:style style:name="T39" style:family="text">
      <style:text-properties style:font-name="Arial" fo:font-size="12pt" style:font-name-asian="Calibri1" style:font-size-asian="12pt" style:font-name-complex="Times New Roman1"/>
    </style:style>
    <style:style style:name="T40" style:family="text">
      <style:text-properties style:font-name="Arial" fo:font-size="14pt" fo:language="es" fo:country="ES" fo:font-style="normal" fo:font-weight="bold" style:font-size-asian="14pt" style:font-style-asian="normal" style:font-weight-asian="bold" style:font-name-complex="Arial2"/>
    </style:style>
    <style:style style:name="T41" style:family="text">
      <style:text-properties officeooo:rsid="000ebef8"/>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style:style style:name="fr2" style:family="graphic" style:parent-style-name="Frame">
      <style:graphic-properties fo:margin-left="0.318cm" fo:margin-right="0.318cm" fo:margin-top="0cm" fo:margin-bottom="0cm" style:run-through="foreground"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54cm" fo:padding-right="0.254cm" fo:padding-top="0.127cm" fo:padding-bottom="0.127cm" fo:border="0.06pt solid #31849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77cm" fo:text-indent="-0.635cm" fo:margin-left="7.177cm"/>
        </style:list-level-properties>
      </text:list-level-style-bullet>
    </text:list-style>
    <style:style style:name="gr1" style:family="graphic">
      <style:graphic-properties draw:stroke="solid" svg:stroke-width="0cm" svg:stroke-color="#31849b" draw:stroke-linejoin="round" svg:stroke-linecap="butt" draw:fill="solid" draw:fill-color="#ffffff" draw:textarea-horizontal-align="center" draw:textarea-vertical-align="top" draw:auto-grow-height="false" loext:decorative="false" fo:margin-left="0.318cm" fo:margin-right="0.318cm" fo:margin-top="0cm" fo:margin-bottom="0cm" style:run-through="foreground" style:wrap="run-through" style:number-wrapped-paragraphs="no-limit" style:vertical-pos="middle" style:vertical-rel="page" style:horizontal-pos="center" style:horizontal-rel="page-start-margin" draw:wrap-influence-on-position="once-concurrent" loext:allow-overlap="true" style:flow-with-text="false" loext:rel-height-rel="page"/>
    </style:style>
    <style:style style:name="gr2" style:family="graphic">
      <style:graphic-properties draw:stroke="solid" svg:stroke-width="0cm" svg:stroke-color="#31849b" draw:stroke-linejoin="round" svg:stroke-linecap="butt" draw:fill="solid" draw:fill-color="#ffffff" draw:textarea-horizontal-align="center" draw:textarea-vertical-align="top" draw:auto-grow-height="false" loext:decorative="false" fo:margin-left="0.318cm" fo:margin-right="0.318cm" fo:margin-top="0cm" fo:margin-bottom="0cm" style:run-through="foreground" style:wrap="run-through" style:number-wrapped-paragraphs="no-limit" style:vertical-pos="middle" style:vertical-rel="page" style:horizontal-pos="center" style:horizontal-rel="page-end-margin" draw:wrap-influence-on-position="once-concurrent" loext:allow-overlap="true" style:flow-with-text="false" loext:rel-height-rel="page"/>
    </style:style>
    <style:style style:name="gr3" style:family="graphic">
      <style:graphic-properties draw:stroke="solid" svg:stroke-width="0cm" svg:stroke-color="#31849b" draw:stroke-linejoin="round" svg:stroke-linecap="butt" draw:fill="solid" draw:fill-color="#4bacc6" draw:textarea-horizontal-align="center" draw:textarea-vertical-align="top" draw:auto-grow-height="false" loext:decorative="false" fo:margin-left="0.318cm" fo:margin-right="0.318cm" fo:margin-top="0cm" fo:margin-bottom="0cm" style:run-through="foreground" style:wrap="run-through" style:number-wrapped-paragraphs="no-limit" style:vertical-pos="top" loext:vertical-rel="page-content-top" style:horizontal-pos="center" style:horizontal-rel="page" draw:wrap-influence-on-position="once-concurrent" loext:allow-overlap="true" style:flow-with-text="false" loext:rel-width-rel="page"/>
    </style:style>
    <style:style style:name="gr4" style:family="graphic">
      <style:graphic-properties draw:stroke="solid" svg:stroke-width="0cm" svg:stroke-color="#31849b" draw:stroke-linejoin="round" svg:stroke-linecap="butt" draw:fill="solid" draw:fill-color="#4bacc6" draw:textarea-horizontal-align="center" draw:textarea-vertical-align="top" draw:auto-grow-height="false" loext:decorative="false"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loext:allow-overlap="true" style:flow-with-text="false" loext:rel-width-rel="page"/>
    </style:style>
    <style:style style:name="gr5" style:family="graphic">
      <style:graphic-properties style:writing-mode="lr-tb" loext:decorative="false"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loext:allow-overlap="true" style:flow-with-text="false"/>
    </style:style>
    <style:style style:name="gr6" style:family="graphic">
      <style:graphic-properties draw:stroke="solid" svg:stroke-width="0cm" svg:stroke-color="#31849b" draw:stroke-linejoin="round" svg:stroke-linecap="butt" draw:fill="none" loext:fill-use-slide-background="false" draw:textarea-vertical-align="top" draw:auto-grow-height="false" fo:min-height="0.002cm" fo:min-width="21.558cm" loext:decorative="false" style:run-through="background"/>
    </style:style>
    <style:style style:name="gr7" style:family="graphic">
      <style:graphic-properties draw:stroke="none" svg:stroke-width="0cm" draw:fill="none" loext:fill-use-slide-background="false" draw:textarea-horizontal-align="center" draw:textarea-vertical-align="top" draw:auto-grow-height="false" loext:decorative="false" style:run-through="background"/>
    </style:style>
    <style:style style:name="gr8" style:family="graphic">
      <style:graphic-properties style:writing-mode="lr-tb" loext:decorative="false" fo:margin-left="0.318cm" fo:margin-right="0.318cm" fo:margin-top="0cm" fo:margin-bottom="0cm" style:run-through="background" style:wrap="run-through" style:number-wrapped-paragraphs="no-limit" style:vertical-pos="top" style:vertical-rel="page" style:horizontal-pos="center" style:horizontal-rel="page" draw:wrap-influence-on-position="once-concurrent" loext:allow-overlap="true" style:flow-with-text="false"/>
    </style:style>
    <style:style style:name="gr9" style:family="graphic">
      <style:graphic-properties draw:stroke="solid" svg:stroke-width="0cm" svg:stroke-color="#31849b" draw:stroke-linejoin="round" svg:stroke-linecap="butt" draw:fill="none" loext:fill-use-slide-background="false" draw:textarea-vertical-align="top" draw:auto-grow-height="false" fo:min-height="0.002cm" fo:min-width="20.971cm" loext:decorative="false" style:run-through="background"/>
    </style:style>
    <style:style style:name="gr10" style:family="graphic">
      <style:graphic-properties draw:stroke="solid" svg:stroke-width="0cm" svg:stroke-color="#205867" draw:stroke-linejoin="round" svg:stroke-linecap="butt" draw:fill="solid" draw:fill-color="#4bacc6" draw:textarea-horizontal-align="center" draw:textarea-vertical-align="top" draw:auto-grow-height="false" loext:decorative="false" fo:margin-left="0.318cm" fo:margin-right="0.318cm" fo:margin-top="0cm" fo:margin-bottom="0cm" style:run-through="background" style:wrap="run-through" style:number-wrapped-paragraphs="no-limit" style:vertical-pos="from-top" style:vertical-rel="page" style:horizontal-pos="from-left" style:horizontal-rel="page-start-margin" draw:wrap-influence-on-position="once-concurrent" loext:allow-overlap="true" style:flow-with-text="false"/>
    </style:style>
    <style:style style:name="gr11" style:family="graphic">
      <style:graphic-properties draw:stroke="solid" svg:stroke-width="0cm" svg:stroke-color="#205867" draw:stroke-linejoin="round" svg:stroke-linecap="butt" draw:fill="solid" draw:fill-color="#4bacc6" draw:textarea-horizontal-align="center" draw:textarea-vertical-align="top" draw:auto-grow-height="false" loext:decorative="false" fo:margin-left="0.318cm" fo:margin-right="0.318cm" fo:margin-top="0cm" fo:margin-bottom="0cm" style:run-through="background" style:wrap="run-through" style:number-wrapped-paragraphs="no-limit" style:vertical-pos="bottom" style:vertical-rel="page" style:horizontal-pos="center" style:horizontal-rel="page-start-margin" draw:wrap-influence-on-position="once-concurrent" loext:allow-overlap="true" style:flow-with-text="false"/>
    </style:style>
    <style:style style:name="gr12" style:family="graphic">
      <style:graphic-properties draw:stroke="solid" svg:stroke-width="0cm" svg:stroke-color="#205867" draw:stroke-linejoin="round" svg:stroke-linecap="butt" draw:fill="solid" draw:fill-color="#4bacc6" draw:textarea-horizontal-align="center" draw:textarea-vertical-align="top" draw:auto-grow-height="false" loext:decorative="false" fo:margin-left="0.318cm" fo:margin-right="0.318cm" fo:margin-top="0cm" fo:margin-bottom="0cm" style:run-through="background" style:wrap="run-through" style:number-wrapped-paragraphs="no-limit" style:vertical-pos="bottom" style:vertical-rel="page" style:horizontal-pos="center"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loext:marker-style-name="T6"/>
      <text:p text:style-name="P20" loext:marker-style-name="T6"/>
      <text:p text:style-name="P20" loext:marker-style-name="T6"><draw:rect text:anchor-type="char" style:rel-width="105%" draw:z-index="60" draw:name="Forma7" draw:style-name="gr4" draw:text-style-name="P42" svg:width="23.111cm" svg:height="2.218cm" svg:x="-1.055cm" svg:y="27.481cm"><text:p/></draw:rect><draw:rect text:anchor-type="char" style:rel-height="105%" draw:z-index="63" draw:name="Forma8" draw:style-name="gr1" draw:text-style-name="P41" svg:width="0.253cm" svg:height="32.223cm" svg:x="1.372cm" svg:y="-1.261cm"><text:p/></draw:rect><draw:rect text:anchor-type="char" style:rel-height="105%" draw:z-index="62" draw:name="Forma9" draw:style-name="gr2" draw:text-style-name="P41" svg:width="0.253cm" svg:height="32.223cm" svg:x="1.372cm" svg:y="-1.261cm"><text:p/></draw:rect><draw:rect text:anchor-type="char" style:rel-width="105%" draw:z-index="61" draw:name="Forma10" draw:style-name="gr3" draw:text-style-name="P42" svg:width="23.111cm" svg:height="2.218cm" svg:x="-1.055cm" svg:y="0cm"><text:p/></draw:rect></text:p>
      <text:p text:style-name="No_20_Spacing" loext:marker-style-name="T6"><loext:content-control loext:plain-text="true" loext:alias="Título" loext:id="14700071"><text:span text:style-name="T7">Estudio de Factibilidad</text:span></loext:content-control></text:p>
      <text:p text:style-name="No_20_Spacing" loext:marker-style-name="T8"><loext:content-control loext:plain-text="true" loext:alias="Subtítulo" loext:id="14700077"><text:span text:style-name="T9">&lt;Divise&gt;</text:span></loext:content-control></text:p>
      <text:p text:style-name="No_20_Spacing"/>
      <text:p text:style-name="No_20_Spacing"/>
      <text:p text:style-name="No_20_Spacing"/>
      <text:p text:style-name="No_20_Spacing"/>
      <text:p text:style-name="No_20_Spacing"><loext:content-control loext:plain-text="true" loext:alias="Compañía" loext:id="3224807"><text:span text:style-name="T12">Grupo 6 - Divise</text:span></loext:content-control></text:p>
      <text:p text:style-name="P21">Valentin Lopez</text:p>
      <text:p text:style-name="Standard"/>
      <text:p text:style-name="PSI_20_-_20_Comentario"/>
      <text:p text:style-name="P5"><draw:frame draw:style-name="fr2" draw:name="Marco1" text:anchor-type="char" svg:x="9.938cm" svg:y="0.187cm" svg:width="5.689cm" svg:height="20.378cm" draw:z-index="64"><draw:text-box><text:p text:style-name="PSI_20_-_20_Descripción_20_del_20_Documentos"/></draw:text-box></draw:frame></text:p>
      <text:p text:style-name="PSI_20_-_20_Comentario"/>
      <text:p text:style-name="PSI_20_-_20_Comentario"/>
      <text:p text:style-name="Standard"/>
      <text:p text:style-name="P6"/>
      <text:p text:style-name="P7"/>
      <text:table-of-content text:style-name="Sect1" text:protected="true" text:name="Sumario1">
        <text:table-of-content-source text:outline-level="3" text:use-index-marks="false">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Tabla de contenido</text:p>
          </text:index-title>
          <text:p text:style-name="Contents_20_1" loext:marker-style-name="T15"><text:a xlink:type="simple" xlink:href="#_Toc257619289" text:style-name="Index_20_Link" text:visited-style-name="Index_20_Link">Introducción<text:span text:style-name="T14"><text:tab/>5</text:span></text:a></text:p>
          <text:p text:style-name="Contents_20_1" loext:marker-style-name="T15"><text:a xlink:type="simple" xlink:href="#_Toc257619290" text:style-name="Index_20_Link" text:visited-style-name="Index_20_Link">Reconocimiento general del sistema<text:span text:style-name="T14"><text:tab/>5</text:span></text:a></text:p>
          <text:p text:style-name="Contents_20_1" loext:marker-style-name="T15"><text:a xlink:type="simple" xlink:href="#_Toc257619291" text:style-name="Index_20_Link" text:visited-style-name="Index_20_Link">Justificación del Proyecto<text:span text:style-name="T14"><text:tab/>5</text:span></text:a></text:p>
          <text:p text:style-name="Contents_20_2" loext:marker-style-name="T16"><text:a xlink:type="simple" xlink:href="#_Toc257619292" text:style-name="Index_20_Link" text:visited-style-name="Index_20_Link">Título del Proyecto<text:span text:style-name="T14"><text:tab/>5</text:span></text:a></text:p>
          <text:p text:style-name="Contents_20_2" loext:marker-style-name="T16"><text:a xlink:type="simple" xlink:href="#_Toc257619293" text:style-name="Index_20_Link" text:visited-style-name="Index_20_Link">Planteamiento del problema o necesidad<text:span text:style-name="T14"><text:tab/>5</text:span></text:a></text:p>
          <text:p text:style-name="Contents_20_2" loext:marker-style-name="T16"><text:a xlink:type="simple" xlink:href="#_Toc257619294" text:style-name="Index_20_Link" text:visited-style-name="Index_20_Link">Antecedentes<text:span text:style-name="T14"><text:tab/>5</text:span></text:a></text:p>
          <text:p text:style-name="Contents_20_2" loext:marker-style-name="T16"><text:a xlink:type="simple" xlink:href="#_Toc257619295" text:style-name="Index_20_Link" text:visited-style-name="Index_20_Link">Justificación del proyecto<text:span text:style-name="T14"><text:tab/>5</text:span></text:a></text:p>
          <text:p text:style-name="Contents_20_2" loext:marker-style-name="T16"><text:a xlink:type="simple" xlink:href="#_Toc257619296" text:style-name="Index_20_Link" text:visited-style-name="Index_20_Link">Descripción del proyecto<text:span text:style-name="T14"><text:tab/>6</text:span></text:a></text:p>
          <text:p text:style-name="Contents_20_1" loext:marker-style-name="T15"><text:a xlink:type="simple" xlink:href="#_Toc257619297" text:style-name="Index_20_Link" text:visited-style-name="Index_20_Link">Plan Estratégico y Objetivo del Proyecto<text:span text:style-name="T14"><text:tab/>6</text:span></text:a></text:p>
          <text:p text:style-name="Contents_20_2" loext:marker-style-name="T16"><text:a xlink:type="simple" xlink:href="#_Toc257619298" text:style-name="Index_20_Link" text:visited-style-name="Index_20_Link">Visión<text:span text:style-name="T14"><text:tab/>6</text:span></text:a></text:p>
          <text:p text:style-name="Contents_20_2" loext:marker-style-name="T16"><text:a xlink:type="simple" xlink:href="#_Toc257619299" text:style-name="Index_20_Link" text:visited-style-name="Index_20_Link">Misión<text:span text:style-name="T14"><text:tab/>6</text:span></text:a></text:p>
          <text:p text:style-name="Contents_20_2" loext:marker-style-name="T16"><text:a xlink:type="simple" xlink:href="#_Toc257619300" text:style-name="Index_20_Link" text:visited-style-name="Index_20_Link">Valores<text:span text:style-name="T14"><text:tab/>6</text:span></text:a></text:p>
          <text:p text:style-name="Contents_20_2" loext:marker-style-name="T16"><text:a xlink:type="simple" xlink:href="#_Toc257619301" text:style-name="Index_20_Link" text:visited-style-name="Index_20_Link">Objetivo del Proyecto<text:span text:style-name="T14"><text:tab/>6</text:span></text:a></text:p>
          <text:p text:style-name="Contents_20_1" loext:marker-style-name="T15"><text:a xlink:type="simple" xlink:href="#_Toc257619302" text:style-name="Index_20_Link" text:visited-style-name="Index_20_Link">Entorno Socioeconómico y Legal<text:span text:style-name="T14"><text:tab/>7</text:span></text:a></text:p>
          <text:p text:style-name="Contents_20_2" loext:marker-style-name="T16"><text:a xlink:type="simple" xlink:href="#_Toc257619303" text:style-name="Index_20_Link" text:visited-style-name="Index_20_Link">Entorno económica<text:span text:style-name="T14"><text:tab/>7</text:span></text:a></text:p>
          <text:p text:style-name="Contents_20_2" loext:marker-style-name="T16"><text:a xlink:type="simple" xlink:href="#_Toc257619304" text:style-name="Index_20_Link" text:visited-style-name="Index_20_Link">Entorno Legal<text:span text:style-name="T14"><text:tab/>7</text:span></text:a></text:p>
          <text:p text:style-name="Contents_20_1" loext:marker-style-name="T15"><text:a xlink:type="simple" xlink:href="#_Toc257619305" text:style-name="Index_20_Link" text:visited-style-name="Index_20_Link">Estudio de Mercado<text:span text:style-name="T14"><text:tab/>7</text:span></text:a></text:p>
          <text:p text:style-name="Contents_20_2" loext:marker-style-name="T16"><text:a xlink:type="simple" xlink:href="#_Toc257619306" text:style-name="Index_20_Link" text:visited-style-name="Index_20_Link">Demanda<text:span text:style-name="T14"><text:tab/>7</text:span></text:a></text:p>
          <text:p text:style-name="Contents_20_3" loext:marker-style-name="T17"><text:a xlink:type="simple" xlink:href="#_Toc257619307" text:style-name="Index_20_Link" text:visited-style-name="Index_20_Link">Población objetivo<text:span text:style-name="T14"><text:tab/>7</text:span></text:a></text:p>
          <text:p text:style-name="Contents_20_3" loext:marker-style-name="T17"><text:a xlink:type="simple" xlink:href="#_Toc257619308" text:style-name="Index_20_Link" text:visited-style-name="Index_20_Link">Análisis de la demanda<text:span text:style-name="T14"><text:tab/>7</text:span></text:a></text:p>
          <text:p text:style-name="Contents_20_2" loext:marker-style-name="T16"><text:a xlink:type="simple" xlink:href="#_Toc257619309" text:style-name="Index_20_Link" text:visited-style-name="Index_20_Link">Oferta<text:span text:style-name="T14"><text:tab/>7</text:span></text:a></text:p>
          <text:p text:style-name="Contents_20_3" loext:marker-style-name="T17"><text:a xlink:type="simple" xlink:href="#_Toc257619310" text:style-name="Index_20_Link" text:visited-style-name="Index_20_Link">Análisis de la oferta<text:span text:style-name="T14"><text:tab/>7</text:span></text:a></text:p>
          <text:p text:style-name="Contents_20_2" loext:marker-style-name="T16"><text:a xlink:type="simple" xlink:href="#_Toc257619311" text:style-name="Index_20_Link" text:visited-style-name="Index_20_Link">Comercialización<text:span text:style-name="T14"><text:tab/>8</text:span></text:a></text:p>
          <text:p text:style-name="Contents_20_3" loext:marker-style-name="T17"><text:a xlink:type="simple" xlink:href="#_Toc257619312" text:style-name="Index_20_Link" text:visited-style-name="Index_20_Link">Producto<text:span text:style-name="T14"><text:tab/>8</text:span></text:a></text:p>
          <text:p text:style-name="Contents_20_3" loext:marker-style-name="T17"><text:a xlink:type="simple" xlink:href="#_Toc257619313" text:style-name="Index_20_Link" text:visited-style-name="Index_20_Link">Precio y Volumen de Ventas<text:span text:style-name="T14"><text:tab/>8</text:span></text:a></text:p>
          <text:p text:style-name="Contents_20_3" loext:marker-style-name="T17"><text:a xlink:type="simple" xlink:href="#_Toc257619314" text:style-name="Index_20_Link" text:visited-style-name="Index_20_Link">Plaza<text:span text:style-name="T14"><text:tab/>8</text:span></text:a></text:p>
          <text:p text:style-name="Contents_20_3" loext:marker-style-name="T17"><text:a xlink:type="simple" xlink:href="#_Toc257619315" text:style-name="Index_20_Link" text:visited-style-name="Index_20_Link">Promoción y Publicidad<text:span text:style-name="T14"><text:tab/>8</text:span></text:a></text:p>
          <text:p text:style-name="Contents_20_1" loext:marker-style-name="T15"><text:a xlink:type="simple" xlink:href="#_Toc257619316" text:style-name="Index_20_Link" text:visited-style-name="Index_20_Link">Estudio Técnico<text:span text:style-name="T14"><text:tab/>8</text:span></text:a></text:p>
          <text:p text:style-name="Contents_20_2" loext:marker-style-name="T16"><text:a xlink:type="simple" xlink:href="#_Toc257619317" text:style-name="Index_20_Link" text:visited-style-name="Index_20_Link">Tamaño del Proyecto<text:span text:style-name="T14"><text:tab/>8</text:span></text:a></text:p>
          <text:p text:style-name="Contents_20_2" loext:marker-style-name="T16"><text:a xlink:type="simple" xlink:href="#_Toc257619318" text:style-name="Index_20_Link" text:visited-style-name="Index_20_Link">Organización<text:span text:style-name="T14"><text:tab/>9</text:span></text:a></text:p>
          <text:p text:style-name="Contents_20_3" loext:marker-style-name="T17"><text:a xlink:type="simple" xlink:href="#_Toc257619319" text:style-name="Index_20_Link" text:visited-style-name="Index_20_Link">Estructura de la organización<text:span text:style-name="T14"><text:tab/>9</text:span></text:a></text:p>
          <text:p text:style-name="Contents_20_3" loext:marker-style-name="T17"><text:a xlink:type="simple" xlink:href="#_Toc257619320" text:style-name="Index_20_Link" text:visited-style-name="Index_20_Link">Recurso humano<text:span text:style-name="T14"><text:tab/>9</text:span></text:a></text:p>
          <text:p text:style-name="Contents_20_3" loext:marker-style-name="T17"><text:a xlink:type="simple" xlink:href="#_Toc257619321" text:style-name="Index_20_Link" text:visited-style-name="Index_20_Link"><text:soft-page-break/>Cronograma de trabajo<text:span text:style-name="T14"><text:tab/>9</text:span></text:a></text:p>
          <text:p text:style-name="Contents_20_1" loext:marker-style-name="T15"><text:a xlink:type="simple" xlink:href="#_Toc257619322" text:style-name="Index_20_Link" text:visited-style-name="Index_20_Link">Evaluación Financiera<text:span text:style-name="T14"><text:tab/>9</text:span></text:a></text:p>
          <text:p text:style-name="Contents_20_2" loext:marker-style-name="T16"><text:a xlink:type="simple" xlink:href="#_Toc257619323" text:style-name="Index_20_Link" text:visited-style-name="Index_20_Link">Inversión<text:span text:style-name="T14"><text:tab/>9</text:span></text:a></text:p>
          <text:p text:style-name="Contents_20_2" loext:marker-style-name="T16"><text:a xlink:type="simple" xlink:href="#_Toc257619324" text:style-name="Index_20_Link" text:visited-style-name="Index_20_Link">Ingresos y Gastos<text:span text:style-name="T14"><text:tab/>9</text:span></text:a></text:p>
          <text:p text:style-name="Contents_20_2" loext:marker-style-name="T16"><text:a xlink:type="simple" xlink:href="#_Toc257619325" text:style-name="Index_20_Link" text:visited-style-name="Index_20_Link">Financiamiento<text:span text:style-name="T14"><text:tab/>9</text:span></text:a></text:p>
          <text:p text:style-name="Contents_20_2" loext:marker-style-name="T16"><text:a xlink:type="simple" xlink:href="#_Toc257619326" text:style-name="Index_20_Link" text:visited-style-name="Index_20_Link">Estados Financieros Proyectados<text:span text:style-name="T14"><text:tab/>10</text:span></text:a></text:p>
          <text:p text:style-name="Contents_20_2" loext:marker-style-name="T16"><text:a xlink:type="simple" xlink:href="#_Toc257619327" text:style-name="Index_20_Link" text:visited-style-name="Index_20_Link">Flujo de Fondos Netos<text:span text:style-name="T14"><text:tab/>10</text:span></text:a></text:p>
          <text:p text:style-name="Contents_20_1" loext:marker-style-name="T15"><text:a xlink:type="simple" xlink:href="#_Toc257619328" text:style-name="Index_20_Link" text:visited-style-name="Index_20_Link"><text:span text:style-name="T10">Beneficios esperados del proyecto</text:span><text:span text:style-name="T14"><text:tab/>10</text:span></text:a></text:p>
          <text:p text:style-name="Contents_20_2" loext:marker-style-name="T16"><text:a xlink:type="simple" xlink:href="#_Toc257619329" text:style-name="Index_20_Link" text:visited-style-name="Index_20_Link"><text:span text:style-name="T10">Cuantificación de beneficios</text:span><text:span text:style-name="T14"><text:tab/>11</text:span></text:a></text:p>
          <text:p text:style-name="P4"/>
        </text:index-body>
      </text:table-of-content>
      <text:p text:style-name="P6"/>
      <text:p text:style-name="Standard"/>
      <text:p text:style-name="P10"><loext:content-control loext:plain-text="true" loext:alias="Título" loext:id="11545898"><text:span text:style-name="T11">Estudio de Factibilidad</text:span></loext:content-control></text:p>
      <text:h text:style-name="PSI_20_-_20_Título_20_1" text:outline-level="1"><text:bookmark-start text:name="_Toc234401294"/><text:bookmark-start text:name="_Toc234647510"/><text:bookmark-start text:name="_Toc235010127"/><text:bookmark-start text:name="_Toc257619289"/><text:bookmark-start text:name="_Toc228449306"/>Introducción<text:bookmark-end text:name="_Toc234401294"/><text:bookmark-end text:name="_Toc234647510"/><text:bookmark-end text:name="_Toc235010127"/><text:bookmark-end text:name="_Toc257619289"/><text:bookmark-end text:name="_Toc228449306"/></text:h>
      <text:p text:style-name="P34" loext:marker-style-name="T11"/>
      <text:h text:style-name="PSI_20_-_20_Título_20_1" text:outline-level="1"><text:bookmark-start text:name="_Toc257619290"/><text:bookmark-start text:name="_Toc235010128"/>Reconocimiento general del sistema<text:bookmark-end text:name="_Toc257619290"/><text:bookmark-end text:name="_Toc235010128"/></text:h>
      <text:p text:style-name="P36" loext:marker-style-name="T18">En el escenario económico actual, la constante variación de los precios y la existencia de múltiples tipos de cambio generan una gran incertidumbre. <text:span text:style-name="T31">Divise</text:span> surge como una solución integral: una plataforma web diseñada para centralizar la información financiera en un solo lugar. El proyecto es viable ya que responde a la necesidad de los usuarios de acceder a datos precisos y actualizados de manera eficiente </text:p>
      <text:h text:style-name="PSI_20_-_20_Título_20_1" text:outline-level="1"><text:bookmark-start text:name="_Toc257619291"/><text:bookmark-start text:name="_Toc235010129"/>Justificación del Proyecto<text:bookmark-end text:name="_Toc257619291"/><text:bookmark-end text:name="_Toc235010129"/></text:h>
      <text:h text:style-name="P2" text:outline-level="2"><text:bookmark-start text:name="_Toc257619292"/><text:bookmark-start text:name="_Toc235010130"/>D<text:bookmark-end text:name="_Toc257619292"/><text:bookmark-end text:name="_Toc235010130"/>ivise</text:h>
      <text:p text:style-name="P38" loext:marker-style-name="T18"><text:span text:style-name="T19">DIVISE</text:span><text:span text:style-name="T18"> - Plataforma de Consulta de Cotizaciones Multidivisa </text:span></text:p>
      <text:p text:style-name="P37" loext:marker-style-name="T22"/>
      <text:h text:style-name="PSI_20_-_20_Título_20_2" text:outline-level="2"><text:bookmark-start text:name="_Toc257619293"/><text:bookmark-start text:name="_Toc235010131"/>Planteamiento del problema o necesidad<text:bookmark-end text:name="_Toc257619293"/><text:bookmark-end text:name="_Toc235010131"/></text:h>
      <text:p text:style-name="P37" loext:marker-style-name="T18"><text:span text:style-name="T28">Históricamente, el acceso a las cotizaciones informales o digitales ha sido desordenado, dependiendo de redes sociales o portales de noticias con interfaces poco amigables. No existía hasta el momento una herramienta técnica que combine la simplicidad de una calculadora con la potencia de un sistema de seguimiento en tiempo real. </text:span></text:p>
      <text:h text:style-name="PSI_20_-_20_Título_20_2" text:outline-level="2"><text:bookmark-start text:name="_Toc257619294"/><text:bookmark-start text:name="_Toc235010132"/>Antecedentes<text:bookmark-end text:name="_Toc257619294"/><text:bookmark-end text:name="_Toc235010132"/></text:h>
      <text:p text:style-name="P38" loext:marker-style-name="T18"><text:span text:style-name="T18">Históricamente, los usuarios debían consultar múltiples sitios web o redes sociales para obtener el valor del dólar informal, otros portales para el MEP y aplicaciones diferentes para cripto. Esta fragmentación, sumada a la brecha cambiaria persistente, ha creado un usuario que demanda actualizaciones minuto a minuto y herramientas de cálculo (calculadoras) que las plataformas tradicionales no ofrecen de forma integrada. </text:span></text:p>
      <text:p text:style-name="P37" loext:marker-style-name="T22"/>
      <text:h text:style-name="PSI_20_-_20_Título_20_2" text:outline-level="2"><text:bookmark-start text:name="_Toc257619295"/><text:bookmark-start text:name="_Toc235010133"/>Justificación del proyecto<text:bookmark-end text:name="_Toc257619295"/><text:bookmark-end text:name="_Toc235010133"/></text:h>
      <text:p text:style-name="P14" loext:marker-style-name="T20"><text:span text:style-name="T20">Este proyecto se justifica por su capacidad de </text:span><text:span text:style-name="T21">centralizar y simplificar</text:span><text:span text:style-name="T20">. Las ventajas principales son la automatización de los datos mediante conexiones con fuentes oficiales y de mercado, la posibilidad de visualizar la evolución de los precios mediante gráficos y la opción de que cada usuario personalice su panel. Esto resuelve de forma definitiva la falta de claridad en el sector financiero. </text:span></text:p>
      <text:p text:style-name="P15" loext:marker-style-name="T23"/>
      <text:h text:style-name="PSI_20_-_20_Título_20_2" text:outline-level="2"><text:bookmark-start text:name="_Toc257619296"/><text:bookmark-start text:name="_Toc235010134"/><text:soft-page-break/>Descripción del proyecto<text:bookmark-end text:name="_Toc257619296"/><text:bookmark-end text:name="_Toc235010134"/></text:h>
      <text:p text:style-name="P14" loext:marker-style-name="T23"><text:span text:style-name="T20">Divise es una aplicación web moderna que utiliza tecnologías de vanguardia como </text:span><text:span text:style-name="T21">React y Node.js</text:span><text:span text:style-name="T20">. Permite a los usuarios consultar valores en vivo, realizar conversiones automáticas y analizar tendencias mediante gráficos interactivos. El sistema está optimizado para ofrecer una experiencia rápida y segura tanto para ahorristas como para profesionales. </text:span></text:p>
      <text:p text:style-name="P39" loext:marker-style-name="T24"/>
      <text:h text:style-name="PSI_20_-_20_Título_20_1" text:outline-level="1"><text:bookmark-start text:name="_Toc257619297"/><text:bookmark-start text:name="_Toc235010135"/>Plan Estratégico y Objetivo del Proyecto<text:bookmark-end text:name="_Toc257619297"/><text:bookmark-end text:name="_Toc235010135"/></text:h>
      <text:p text:style-name="P16" loext:marker-style-name="T25"/>
      <text:h text:style-name="PSI_20_-_20_Título_20_2" text:outline-level="2"><text:bookmark-start text:name="_Toc257619298"/><text:bookmark-start text:name="_Toc235010136"/>Visión<text:bookmark-end text:name="_Toc257619298"/><text:bookmark-end text:name="_Toc235010136"/></text:h>
      <text:p text:style-name="PSI_20_-_20_Comentario" loext:marker-style-name="T28"><text:span text:style-name="T28">Convertirnos en la plataforma de referencia para la consulta financiera en el país, destacándonos por la calidad de nuestra interfaz y la exactitud de nuestros datos. </text:span><text:bookmark-start text:name="_Toc235010137"/></text:p>
      <text:h text:style-name="PSI_20_-_20_Título_20_2" text:outline-level="2"><text:bookmark-start text:name="_Toc257619299"/>Misión<text:bookmark-end text:name="_Toc257619299"/><text:bookmark-end text:name="_Toc235010137"/></text:h>
      <text:p text:style-name="PSI_20_-_20_Comentario" loext:marker-style-name="T28"><text:span text:style-name="T28">Brindar herramientas digitales accesibles que permitan a las personas comprender y gestionar su información financiera de manera sencilla y transparente. </text:span></text:p>
      <text:h text:style-name="PSI_20_-_20_Título_20_2" text:outline-level="2"><text:bookmark-start text:name="_Toc257619300"/><text:bookmark-start text:name="_Toc235010138"/>Valores<text:bookmark-end text:name="_Toc257619300"/><text:bookmark-end text:name="_Toc235010138"/></text:h>
      <text:list xml:id="list1826196204" text:style-name="WWNum10">
        <text:list-item>
          <text:p text:style-name="P28"><text:span text:style-name="T31">Transparencia:</text:span> Información basada en fuentes reales.</text:p>
        </text:list-item>
        <text:list-item>
          <text:p text:style-name="P29"><text:span text:style-name="T31">Eficiencia:</text:span> Rapidez en la carga y actualización de datos. </text:p>
        </text:list-item>
        <text:list-item>
          <text:p text:style-name="P28" loext:marker-style-name="T32"><text:span text:style-name="T31">Innovación:</text:span> Mejora constante de las funcionalidades técnicas. <text:s/></text:p>
        </text:list-item>
        <text:list-item>
          <text:p text:style-name="P29" loext:marker-style-name="T32"><text:span text:style-name="T31">Claridad:</text:span> Diseño enfocado en que el usuario encuentre lo que busca sin vueltas. </text:p>
        </text:list-item>
      </text:list>
      <text:h text:style-name="PSI_20_-_20_Título_20_2" text:outline-level="2"><text:bookmark-start text:name="_Toc257619301"/><text:bookmark-start text:name="_Toc235010139"/>Objetivo del Proyecto<text:bookmark-end text:name="_Toc257619301"/><text:bookmark-end text:name="_Toc235010139"/></text:h>
      <text:p text:style-name="P22">Desarrollar y poner en funcionamiento la plataforma "Divise" en un periodo de 16 semanas. El sistema debe garantizar actualizaciones cada 5 minutos y permitir la gestión personalizada de al menos 25 activos financieros diferentes. </text:p>
      <text:p text:style-name="P16" loext:marker-style-name="T25"/>
      <text:h text:style-name="PSI_20_-_20_Título_20_1" text:outline-level="1"><text:bookmark-start text:name="_Toc257619302"/><text:bookmark-start text:name="_Toc235010140"/>Entorno Socioeconómico y Legal<text:bookmark-end text:name="_Toc257619302"/><text:bookmark-end text:name="_Toc235010140"/></text:h>
      <text:h text:style-name="PSI_20_-_20_Título_20_2" text:outline-level="2"><text:bookmark-start text:name="_Toc257619303"/><text:bookmark-start text:name="_Toc235010141"/>Entorno económica<text:bookmark-end text:name="_Toc257619303"/><text:bookmark-end text:name="_Toc235010141"/></text:h>
      <text:p text:style-name="P22">El proyecto se desarrolla en un contexto donde el seguimiento de la moneda extranjera es una actividad cotidiana. Existe una demanda constante de este tipo de servicios, lo que asegura que la plataforma tenga un flujo importante de usuarios interesados en proteger su valor adquisitivo. </text:p>
      <text:p text:style-name="P18" loext:marker-style-name="T27"/>
      <text:h text:style-name="PSI_20_-_20_Título_20_2" text:outline-level="2"><text:bookmark-start text:name="_Toc257619304"/><text:bookmark-start text:name="_Toc235010142"/>Entorno Legal<text:bookmark-end text:name="_Toc257619304"/><text:bookmark-end text:name="_Toc235010142"/></text:h>
      <text:p text:style-name="PSI_20_-_20_Comentario" loext:marker-style-name="T28"><text:span text:style-name="T28">El funcionamiento del sistema respeta la </text:span><text:span text:style-name="T30">Ley de Protección de Datos Personales</text:span><text:span text:style-name="T28"> en el manejo de cuentas de usuario. Además, se incluye un aviso legal informando que la plataforma es </text:span><text:soft-page-break/><text:span text:style-name="T28">estrictamente informativa, cumpliendo con las normativas vigentes sobre servicios de información financiera. </text:span></text:p>
      <text:p text:style-name="PSI_20_-_20_Comentario"/>
      <text:h text:style-name="PSI_20_-_20_Título_20_1" text:outline-level="1"><text:bookmark-start text:name="_Toc257619305"/><text:bookmark-start text:name="_Toc235010143"/>Estudio de Mercado<text:bookmark-end text:name="_Toc257619305"/><text:bookmark-end text:name="_Toc235010143"/></text:h>
      <text:p text:style-name="PSI_20_-_20_Comentario" loext:marker-style-name="T28"><text:span text:style-name="T28">[</text:span>En esta sección se desarrolla un análisis de las variables competitivas del proyecto, describiendo la demanda (actual y futura), la oferta (la competencia), el precio y la comercialización del producto (plaza y promoción).<text:span text:style-name="T28">]</text:span></text:p>
      <text:p text:style-name="P22" loext:marker-style-name="T28"/>
      <text:h text:style-name="PSI_20_-_20_Título_20_2" text:outline-level="2"><text:bookmark-start text:name="_Toc257619306"/><text:bookmark-start text:name="_Toc235010144"/>Demanda<text:bookmark-end text:name="_Toc257619306"/><text:bookmark-end text:name="_Toc235010144"/></text:h>
      <text:p text:style-name="P16" loext:marker-style-name="T25"/>
      <text:h text:style-name="PSI_20_-_20_Título_20_3" text:outline-level="3"><text:bookmark-start text:name="_Toc257619307"/><text:bookmark-start text:name="_Toc235010145"/>Población objetivo<text:bookmark-end text:name="_Toc257619307"/><text:bookmark-end text:name="_Toc235010145"/></text:h>
      <text:p text:style-name="P22">El nicho principal son jóvenes y adultos (18-50 años) residentes en Argentina que manejan ahorros en diversas monedas o realizan transacciones en cripto. Incluye tanto a pequeños ahorristas como a trabajadores autónomos que cobran en moneda extranjera. </text:p>
      <text:p text:style-name="P16" loext:marker-style-name="T25"/>
      <text:h text:style-name="PSI_20_-_20_Título_20_3" text:outline-level="3"><text:bookmark-start text:name="_Toc257619308"/><text:bookmark-start text:name="_Toc235010146"/>Análisis de la demanda<text:bookmark-end text:name="_Toc257619308"/><text:bookmark-end text:name="_Toc235010146"/></text:h>
      <text:p text:style-name="P22">Históricamente, la demanda de información cambiaria en el país tiene picos de alta intensidad en momentos de volatilidad. Se proyecta que la demanda crecerá a medida que el mercado de criptomonedas se masifique. El objetivo es captar una parte del mercado que hoy utiliza herramientas dispersas o poco intuitivas. </text:p>
      <text:p text:style-name="P16" loext:marker-style-name="T25"/>
      <text:h text:style-name="PSI_20_-_20_Título_20_2" text:outline-level="2"><text:bookmark-start text:name="_Toc257619309"/><text:bookmark-start text:name="_Toc235010147"/>Oferta<text:bookmark-end text:name="_Toc257619309"/><text:bookmark-end text:name="_Toc235010147"/></text:h>
      <text:p text:style-name="P16" loext:marker-style-name="T25"/>
      <text:h text:style-name="PSI_20_-_20_Título_20_3" text:outline-level="3"><text:bookmark-start text:name="_Toc257619310"/><text:bookmark-start text:name="_Toc235010148"/>Análisis de la oferta<text:bookmark-end text:name="_Toc257619310"/><text:bookmark-end text:name="_Toc235010148"/></text:h>
      <text:p text:style-name="P22">La competencia actual está compuesta por portales de noticias financieras y aplicaciones móviles específicas de cripto. Nuestra ventaja competitiva es la integración: ofrecemos en una sola pantalla lo que otros ofrecen por separado, eliminando la necesidad de saltar entre sitios web. </text:p>
      <text:p text:style-name="P16" loext:marker-style-name="T25"/>
      <text:h text:style-name="PSI_20_-_20_Título_20_2" text:outline-level="2"/>
      <text:h text:style-name="PSI_20_-_20_Título_20_2" text:outline-level="2"/>
      <text:h text:style-name="PSI_20_-_20_Título_20_2" text:outline-level="2"><text:bookmark-start text:name="_Toc257619311"/><text:bookmark-start text:name="_Toc235010149"/>Comercialización<text:bookmark-end text:name="_Toc257619311"/><text:bookmark-end text:name="_Toc235010149"/></text:h>
      <text:p text:style-name="P16" loext:marker-style-name="T25"/>
      <text:h text:style-name="PSI_20_-_20_Título_20_3" text:outline-level="3"><text:bookmark-start text:name="_Toc257619312"/><text:bookmark-start text:name="_Toc235010150"/><text:soft-page-break/>Producto<text:bookmark-end text:name="_Toc257619312"/><text:bookmark-end text:name="_Toc235010150"/></text:h>
      <text:p text:style-name="PSI_20_-_20_Comentario"><text:span text:style-name="T29">Divise</text:span><text:span text:style-name="T28"> es un ecosistema digital de información. No es solo una "web de precios", es una herramienta de asistencia financiera que incluye una calculadora multimoneda, un panel de favoritos personalizable y gráficos de tendencias que ayudan al usuario a entender el mercado de forma visual. </text:span></text:p>
      <text:p text:style-name="P16" loext:marker-style-name="T25"/>
      <text:h text:style-name="PSI_20_-_20_Título_20_3" text:outline-level="3"><text:bookmark-start text:name="_Toc257619313"/><text:bookmark-start text:name="_Toc235010151"/>Precio y Volumen de Ventas<text:bookmark-end text:name="_Toc257619313"/><text:bookmark-end text:name="_Toc235010151"/></text:h>
      <text:p text:style-name="PSI_20_-_20_Comentario" loext:marker-style-name="T32"><text:span text:style-name="T28">Dado que es un producto de software de acceso libre, el "volumen" se mide en tráfico de usuarios. El costo de mantenimiento es bajo, lo que permite ofrecer el servicio gratuitamente y proyectar ingresos mediante espacios de promoción para empresas del sector FinTech </text:span></text:p>
      <text:h text:style-name="PSI_20_-_20_Título_20_3" text:outline-level="3"><text:bookmark-start text:name="_Toc257619314"/><text:bookmark-start text:name="_Toc235010152"/>Plaza<text:bookmark-end text:name="_Toc257619314"/><text:bookmark-end text:name="_Toc235010152"/></text:h>
      <text:p text:style-name="P22">El canal de distribución es puramente digital. Al estar alojado en la nube, el producto llega directamente al consumidor final sin intermediarios a través de cualquier navegador web. </text:p>
      <text:p text:style-name="P16" loext:marker-style-name="T25"/>
      <text:h text:style-name="PSI_20_-_20_Título_20_3" text:outline-level="3"><text:bookmark-start text:name="_Toc257619315"/><text:bookmark-start text:name="_Toc235010153"/>Promoción y Publicidad<text:bookmark-end text:name="_Toc257619315"/><text:bookmark-end text:name="_Toc235010153"/></text:h>
      <text:p text:style-name="P22">La estrategia se basa en el posicionamiento orgánico (SEO) y presencia en redes sociales especializadas en finanzas y tecnología. Se estima un presupuesto anual mínimo para mantenimiento de servidores y pequeñas campañas de difusión digital. </text:p>
      <text:h text:style-name="PSI_20_-_20_Título_20_1" text:outline-level="1"/>
      <text:h text:style-name="PSI_20_-_20_Título_20_1" text:outline-level="1" loext:marker-style-name="T33"><text:bookmark-start text:name="_Toc257619316"/><text:bookmark-start text:name="_Toc235010154"/>Estudio Técnico<text:bookmark-end text:name="_Toc257619316"/><text:bookmark-end text:name="_Toc235010154"/><text:span text:style-name="T33"> </text:span><text:span text:style-name="T33"/></text:h>
      <text:p text:style-name="PSI_20_-_20_Comentario" loext:marker-style-name="T28"><text:span text:style-name="T28">El propósito de este estudio es detallar la viabilidad técnica de </text:span><text:span text:style-name="T30">Divise</text:span><text:span text:style-name="T28">, especificando los recursos tecnológicos, la infraestructura y los límites del sistema. Este análisis permite asegurar que el equipo cuenta con las herramientas necesarias para transformar los requerimientos en un producto funcional, estable y escalable. </text:span></text:p>
      <text:h text:style-name="P32" text:outline-level="2"/>
      <text:h text:style-name="P32" text:outline-level="2"><text:bookmark-start text:name="_Toc257619318"/><text:bookmark-start text:name="_Toc235010156"/>Organización<text:bookmark-end text:name="_Toc257619318"/><text:bookmark-end text:name="_Toc235010156"/></text:h>
      <text:p text:style-name="P17" loext:marker-style-name="T26"/>
      <text:h text:style-name="PSI_20_-_20_Título_20_3" text:outline-level="3"><text:bookmark-start text:name="_Toc257619319"/><text:bookmark-start text:name="_Toc235010157"/>Estructura de la organización<text:bookmark-end text:name="_Toc257619319"/><text:bookmark-end text:name="_Toc235010157"/></text:h>
      <text:p text:style-name="P22">Se utiliza una estructura ágil. Como equipo de 7mo año, funcionamos como una cooperativa tecnológica donde cada área tiene autonomía pero responde a una coordinación central (Project Manager).</text:p>
      <text:p text:style-name="PSI_20_-_20_Comentario"/>
      <text:p text:style-name="P17" loext:marker-style-name="T26"/>
      <text:h text:style-name="PSI_20_-_20_Título_20_3" text:outline-level="3"><text:bookmark-start text:name="_Toc257619320"/><text:bookmark-start text:name="_Toc235010158"/>Recurso humano<text:bookmark-end text:name="_Toc257619320"/><text:bookmark-end text:name="_Toc235010158"/></text:h>
      <text:p text:style-name="P8"><text:span text:style-name="T31">Project Manager:</text:span> Supervisión de plazos y cumplimiento de requerimientos. </text:p>
      <text:p text:style-name="P8"><text:soft-page-break/><text:span text:style-name="T31">Desarrolladores (Front y Back):</text:span> Creación del código y conexión con APIs.</text:p>
      <text:p text:style-name="P8"><text:span text:style-name="T31">Especialista en Datos:</text:span> Diseño de la base de datos y seguridad. </text:p>
      <text:p text:style-name="P8"><text:span text:style-name="T31">Diseñador UX/UI:</text:span> Responsable de la estética y facilidad de uso. </text:p>
      <text:p text:style-name="P8"><text:span text:style-name="T28"/></text:p>
      <text:p text:style-name="P16" loext:marker-style-name="T25"/>
      <text:h text:style-name="PSI_20_-_20_Título_20_3" text:outline-level="3"><text:bookmark-start text:name="_Toc257619321"/><text:bookmark-start text:name="_Toc235010159"/>Cronograma de trabajo<text:bookmark-end text:name="_Toc257619321"/><text:bookmark-end text:name="_Toc235010159"/></text:h>
      <text:p text:style-name="P22"><text:span text:style-name="T41">E</text:span>l plan se divide en 16 semanas. Incluye etapas de investigación, diseño de maquetas, programación del núcleo, integración de APIs, pruebas de error y el despliegue final a producción. </text:p>
      <text:h text:style-name="PSI_20_-_20_Título_20_1" text:outline-level="1"><text:bookmark-start text:name="_Toc257619322"/><text:bookmark-start text:name="_Toc235010160"/>Evaluación Financiera<text:bookmark-end text:name="_Toc257619322"/><text:bookmark-end text:name="_Toc235010160"/></text:h>
      <text:p text:style-name="PSI_20_-_20_Comentario" loext:marker-style-name="T28"><text:span text:style-name="T28">Esta sección comprende la inversión inicial, la proyección de los ingresos y los gastos operativos. Se evalúan las fuentes de financiamiento y se analizan los criterios financieros para determinar la rentabilidad y viabilidad del proyecto a largo plazo. </text:span></text:p>
      <text:h text:style-name="PSI_20_-_20_Título_20_2" text:outline-level="2"><text:bookmark-start text:name="_Toc257619323"/><text:bookmark-start text:name="_Toc235010161"/>Inversión<text:bookmark-end text:name="_Toc257619323"/><text:bookmark-end text:name="_Toc235010161"/></text:h>
      <text:p text:style-name="PSI_20_-_20_Comentario"><text:span text:style-name="T28">Para el desarrollo de </text:span><text:span text:style-name="T30">Divise</text:span><text:span text:style-name="T28">, se ha optado por un modelo de inversión mínima, aprovechando los recursos técnicos ya disponibles por el equipo de trabajo. </text:span></text:p>
      <text:p text:style-name="P40" loext:marker-style-name="T35"/>
      <text:h text:style-name="PSI_20_-_20_Título_20_2" text:outline-level="2"><text:bookmark-start text:name="_Toc257619324"/><text:bookmark-start text:name="_Toc235010162"/>Ingresos y Gastos<text:bookmark-end text:name="_Toc257619324"/><text:bookmark-end text:name="_Toc235010162"/></text:h>
      <text:p text:style-name="P22">Al ser un proyecto de fin de ciclo lectivo, no se proyectan ingresos monetarios en la fase de evaluación. El "ingreso" se traduce en el activo intelectual generado (el software funcionando). </text:p>
      <text:p text:style-name="PSI_20_-_20_Comentario"><text:span text:style-name="T28">Se utilizarán herramientas de código abierto (Open Source) y capas gratuitas de servicios en la nube, lo que reduce los gastos operativos a </text:span><text:span text:style-name="T30">$0</text:span><text:span text:style-name="T28"> durante el periodo de examen y exposición. </text:span></text:p>
      <text:p text:style-name="Text_20_body"/>
      <text:p text:style-name="PSI_20_-_20_Comentario"><text:span text:style-name="T28"/></text:p>
      <text:p text:style-name="P40" loext:marker-style-name="T35"/>
      <text:h text:style-name="PSI_20_-_20_Título_20_2" text:outline-level="2"><text:bookmark-start text:name="_Toc257619325"/><text:bookmark-start text:name="_Toc235010163"/>Financiamiento<text:bookmark-end text:name="_Toc257619325"/><text:bookmark-end text:name="_Toc235010163"/></text:h>
      <text:p text:style-name="PSI_20_-_20_Comentario"><text:span text:style-name="T28">Para la ejecución de </text:span><text:span text:style-name="T30">Divise</text:span><text:span text:style-name="T28">, se han analizado las diversas fuentes de financiamiento disponibles en el mercado actual. Debido a que el proyecto se desarrolla en un ámbito educativo de 7mo año, se evaluaron las siguientes opciones: </text:span></text:p>
      <text:p text:style-name="P35" loext:marker-style-name="T13"/>
      <text:h text:style-name="PSI_20_-_20_Título_20_2" text:outline-level="2"><text:bookmark-start text:name="_Toc257619326"/><text:bookmark-start text:name="_Toc235010164"/><text:soft-page-break/>Estados Financieros Proyectados<text:bookmark-end text:name="_Toc257619326"/><text:bookmark-end text:name="_Toc235010164"/></text:h>
      <text:p text:style-name="P23">Al trabajar con una estructura de costo cero, los estados proyectados se presentan de la siguiente manera.</text:p>
      <text:list text:style-name="L1">
        <text:list-item>
          <text:p text:style-name="P24"><text:span text:style-name="T30">Estado de Resultados:</text:span><text:span text:style-name="T28"> Refleja una utilidad neta equilibrada. Al no existir costos de ventas ni gastos administrativos monetarios, el beneficio se percibe en la creación del activo (el software).</text:span></text:p>
        </text:list-item>
        <text:list-item>
          <text:p text:style-name="P24"><text:span text:style-name="T31">Flujo de Efectivo:</text:span> Se mantiene estable. No existen entradas de dinero por ventas ni salidas por gastos operativos, asegurando que el proyecto nunca entre en déficit.</text:p>
        </text:list-item>
        <text:list-item>
          <text:p text:style-name="P24"><text:span text:style-name="T31">Balance General:</text:span> El activo principal es el <text:span text:style-name="T31">Activo Intangible</text:span> representado por el código fuente, la base de datos y el diseño de la plataforma desarrollado por el equipo.</text:p>
        </text:list-item>
      </text:list>
      <text:h text:style-name="PSI_20_-_20_Título_20_2" text:outline-level="2"><text:bookmark-start text:name="_Toc257619327"/><text:bookmark-start text:name="_Toc235010165"/>Flujo de Fondos Netos<text:bookmark-end text:name="_Toc257619327"/><text:bookmark-end text:name="_Toc235010165"/></text:h>
      <text:p text:style-name="PSI_20_-_20_Comentario">Para determinar la rentabilidad del proyecto desde una perspectiva de eficiencia, se analizan los siguientes criterios: </text:p>
      <text:list text:continue-list="list1826196204" text:style-name="WWNum10">
        <text:list-item>
          <text:p text:style-name="P29">Valor Actual Neto: Dado que la inversión inicial es $0, cualquier beneficio futuro en ahorro de tiempo o precisión arroja un VAN positivo, confirmando que el proyecto genera valor. </text:p>
        </text:list-item>
        <text:list-item>
          <text:p text:style-name="P29">Tasa Interna de Retorno: La TIR es excepcionalmente alta debido a la ausencia de egresos iniciales, lo que demuestra una rentabilidad técnica óptima. </text:p>
        </text:list-item>
        <text:list-item>
          <text:p text:style-name="P29">Relación Beneficio/Costo: El beneficio operativo (ahorro de tiempo y centralización) supera ampliamente al costo de mantenimiento ($0), resultando en una relación altamente favorable. </text:p>
        </text:list-item>
      </text:list>
      <text:p text:style-name="P30"/>
      <text:h text:style-name="PSI_20_-_20_Título_20_1" text:outline-level="1" loext:marker-style-name="T36"><text:bookmark-start text:name="_Toc257619328"/><text:bookmark-start text:name="_Toc235010166"/><text:span text:style-name="T36">Beneficios esperados del proyecto</text:span><text:bookmark-end text:name="_Toc257619328"/><text:bookmark-end text:name="_Toc235010166"/><text:span text:style-name="T36"/></text:h>
      <text:p text:style-name="PSI_20_-_20_Comentario" loext:marker-style-name="T28"><text:span text:style-name="T28">El sistema propuesto elimina los problemas de dispersión de datos y cálculos manuales del sistema actual (consultas en múltiples webs). </text:span></text:p>
      <text:p text:style-name="P25" loext:marker-style-name="T28"><text:span text:style-name="T28">Beneficios tangibles: </text:span></text:p>
      <text:p text:style-name="P25" loext:marker-style-name="T28"><text:span text:style-name="T30">Mejoras en la eficiencia:</text:span><text:span text:style-name="T28"> Reducción del tiempo de respuesta ante consultas cambiarias.</text:span></text:p>
      <text:p text:style-name="P25" loext:marker-style-name="T28"><text:span text:style-name="T31">Disponibilidad de información:</text:span> Acceso inmediato a datos históricos sin costo adicional.</text:p>
      <text:p text:style-name="P25" loext:marker-style-name="T28"><text:span text:style-name="T28">Beneficios intangibles: </text:span><text:span text:style-name="T30">Aumento en la confiabilidad:</text:span><text:span text:style-name="T28"> Eliminación del error humano en las conversiones.</text:span></text:p>
      <text:p text:style-name="P25" loext:marker-style-name="T28"><text:span text:style-name="T31">Logro de ventajas competitivas:</text:span> Posicionamiento de una herramienta única que unifica divisas y criptomonedas.</text:p>
      <text:p text:style-name="P25" loext:marker-style-name="T28"><text:span text:style-name="T31">Toma acertada de decisiones:</text:span> Información oportuna para proteger el valor de los ahorros.</text:p>
      <text:p text:style-name="P26" loext:marker-style-name="T28"><text:soft-page-break/></text:p>
      <text:h text:style-name="P31" text:outline-level="2" loext:marker-style-name="T37"><text:bookmark-start text:name="_Toc235010167"/><text:bookmark-start text:name="_Toc257619329"/><text:span text:style-name="T37">Cuantificación de beneficios</text:span><text:bookmark-end text:name="_Toc235010167"/><text:bookmark-end text:name="_Toc257619329"/></text:h>
      <text:p text:style-name="PSI_20_-_20_Comentario"><text:span text:style-name="T28">A continuación, se cuantifican los beneficios basados en la eficiencia operativa durante la </text:span><text:span text:style-name="T30">vida útil</text:span><text:span text:style-name="T28"> estimada del sistema (5 años).</text:span></text:p>
      <text:p text:style-name="PSI_20_-_20_Comentario"><text:span text:style-name="T28"/></text:p>
      <text:p text:style-name="P27" loext:marker-style-name="T40"><draw:frame draw:style-name="fr1" draw:name="Marco2" text:anchor-type="paragraph" svg:x="-0.132cm" svg:y="0.669cm" svg:width="15.801cm" draw:z-index="65" loext:may-break-between-pages="true"><draw:text-box fo:min-height="0.041cm"><table:table table:name="Tabla1" table:style-name="Tabla1"><table:table-column table:style-name="Tabla1.A"/><table:table-column table:style-name="Tabla1.B"/><table:table-column table:style-name="Tabla1.C"/><table:table-column table:style-name="Tabla1.A"/><table:table-column table:style-name="Tabla1.B"/><table:table-column table:style-name="Tabla1.C"/><table:table-row table:style-name="Tabla1.1"><table:table-cell table:style-name="Tabla1.A1" office:value-type="string"><text:p text:style-name="P13" loext:marker-style-name="T38"><text:span text:style-name="T38">Variable</text:span></text:p></table:table-cell><table:table-cell table:style-name="Tabla1.A1" office:value-type="string"><text:p text:style-name="P13" loext:marker-style-name="T38"><text:span text:style-name="T38">Costo Sma. Actual (A)</text:span></text:p></table:table-cell><table:table-cell table:style-name="Tabla1.A1" office:value-type="string"><text:p text:style-name="P13" loext:marker-style-name="T38"><text:span text:style-name="T38">Costo Sma. Propuesto (B)</text:span></text:p></table:table-cell><table:table-cell table:style-name="Tabla1.A1" office:value-type="string"><text:p text:style-name="P13" loext:marker-style-name="T38"><text:span text:style-name="T38">Beneficio (A-B)</text:span></text:p></table:table-cell><table:table-cell table:style-name="Tabla1.A1" office:value-type="string"><text:p text:style-name="P13" loext:marker-style-name="T38"><text:span text:style-name="T38">Vida Útil</text:span></text:p></table:table-cell><table:table-cell table:style-name="Tabla1.A1" office:value-type="string"><text:p text:style-name="P13" loext:marker-style-name="T38"><text:span text:style-name="T38">Total</text:span></text:p></table:table-cell></table:table-row><table:table-row table:style-name="Tabla1.2"><table:table-cell table:style-name="Tabla1.A2" office:value-type="string"><text:p text:style-name="P11" loext:marker-style-name="T39">Tiempo de consulta </text:p></table:table-cell><table:table-cell table:style-name="Tabla1.A2" office:value-type="string"><text:p text:style-name="P11" loext:marker-style-name="T39">$50.000 </text:p></table:table-cell><table:table-cell table:style-name="Tabla1.A2" office:value-type="string"><text:p text:style-name="P11" loext:marker-style-name="T39">$2.000 </text:p></table:table-cell><table:table-cell table:style-name="Tabla1.A2" office:value-type="string"><text:p text:style-name="P12" loext:marker-style-name="T39"><text:span text:style-name="T31">$48.000</text:span> </text:p></table:table-cell><table:table-cell table:style-name="Tabla1.A2" office:value-type="string"><text:p text:style-name="P11" loext:marker-style-name="T39">5 años </text:p></table:table-cell><table:table-cell table:style-name="Tabla1.A2" office:value-type="string"><text:p text:style-name="P11" loext:marker-style-name="T39">$240.000 </text:p></table:table-cell></table:table-row><table:table-row table:style-name="Tabla1.2"><table:table-cell table:style-name="Tabla1.A3" office:value-type="string"><text:p text:style-name="P11" loext:marker-style-name="T39">Precisión de datos </text:p></table:table-cell><table:table-cell table:style-name="Tabla1.A3" office:value-type="string"><text:p text:style-name="P11" loext:marker-style-name="T39">$25.000 </text:p></table:table-cell><table:table-cell table:style-name="Tabla1.A3" office:value-type="string"><text:p text:style-name="P11" loext:marker-style-name="T39">$0 </text:p></table:table-cell><table:table-cell table:style-name="Tabla1.A3" office:value-type="string"><text:p text:style-name="P11" loext:marker-style-name="T39">$25.000 </text:p></table:table-cell><table:table-cell table:style-name="Tabla1.A3" office:value-type="string"><text:p text:style-name="P12" loext:marker-style-name="T39">5 años </text:p></table:table-cell><table:table-cell table:style-name="Tabla1.A3" office:value-type="string"><text:p text:style-name="P11" loext:marker-style-name="T39">$125.000 </text:p></table:table-cell></table:table-row><table:table-row table:style-name="Tabla1.2"><table:table-cell table:style-name="Tabla1.A3" office:value-type="string"><text:p text:style-name="P11" loext:marker-style-name="T39">Centralización </text:p></table:table-cell><table:table-cell table:style-name="Tabla1.A3" office:value-type="string"><text:p text:style-name="P11" loext:marker-style-name="T39">$15.000 </text:p></table:table-cell><table:table-cell table:style-name="Tabla1.A3" office:value-type="string"><text:p text:style-name="P11" loext:marker-style-name="T39">$0 </text:p></table:table-cell><table:table-cell table:style-name="Tabla1.A3" office:value-type="string"><text:p text:style-name="P11" loext:marker-style-name="T39">$15.000 </text:p></table:table-cell><table:table-cell table:style-name="Tabla1.A3" office:value-type="string"><text:p text:style-name="P11" loext:marker-style-name="T39">5 años </text:p></table:table-cell><table:table-cell table:style-name="Tabla1.A3" office:value-type="string"><text:p text:style-name="P11" loext:marker-style-name="T39"><text:span text:style-name="T31">$75.000</text:span> </text:p></table:table-cell></table:table-row><table:table-row table:style-name="Tabla1.2"><table:table-cell table:style-name="Tabla1.A3" office:value-type="string"><text:p text:style-name="P11" loext:marker-style-name="T39">Uso de Recursos </text:p></table:table-cell><table:table-cell table:style-name="Tabla1.A3" office:value-type="string"><text:p text:style-name="P11" loext:marker-style-name="T39">$10.000 </text:p></table:table-cell><table:table-cell table:style-name="Tabla1.A3" office:value-type="string"><text:p text:style-name="P11" loext:marker-style-name="T39">$1.000 </text:p></table:table-cell><table:table-cell table:style-name="Tabla1.A3" office:value-type="string"><text:p text:style-name="P11" loext:marker-style-name="T39">$9.000 </text:p></table:table-cell><table:table-cell table:style-name="Tabla1.A3" office:value-type="string"><text:p text:style-name="P11" loext:marker-style-name="T39">5 años </text:p></table:table-cell><table:table-cell table:style-name="Tabla1.A3" office:value-type="string"><text:p text:style-name="P11" loext:marker-style-name="T39">$45.000 </text:p></table:table-cell></table:table-row><table:table-row table:style-name="Tabla1.2"><table:table-cell table:style-name="Tabla1.A3" office:value-type="string"><text:p text:style-name="P11" loext:marker-style-name="T39">Soporte Técnico </text:p></table:table-cell><table:table-cell table:style-name="Tabla1.A3" office:value-type="string"><text:p text:style-name="P11" loext:marker-style-name="T39">$20.000 </text:p></table:table-cell><table:table-cell table:style-name="Tabla1.A3" office:value-type="string"><text:p text:style-name="P11" loext:marker-style-name="T39">$5.000 </text:p></table:table-cell><table:table-cell table:style-name="Tabla1.A3" office:value-type="string"><text:p text:style-name="P11" loext:marker-style-name="T39">$15.000 </text:p></table:table-cell><table:table-cell table:style-name="Tabla1.A3" office:value-type="string"><text:p text:style-name="P11" loext:marker-style-name="T39">5 años </text:p></table:table-cell><table:table-cell table:style-name="Tabla1.A3" office:value-type="string"><text:p text:style-name="P11" loext:marker-style-name="T39"><text:span text:style-name="T31">$75.000</text:span> </text:p></table:table-cell></table:table-row><table:table-row table:style-name="Tabla1.2"><table:table-cell table:style-name="Tabla1.A3" office:value-type="string"><text:p text:style-name="P9">TOTAL GENERAL </text:p></table:table-cell><table:table-cell table:style-name="Tabla1.A3" office:value-type="string"><text:p text:style-name="P9"/></table:table-cell><table:table-cell table:style-name="Tabla1.A3" office:value-type="string"><text:p text:style-name="P9"/></table:table-cell><table:table-cell table:style-name="Tabla1.A3" office:value-type="string"><text:p text:style-name="P9"/></table:table-cell><table:table-cell table:style-name="Tabla1.A3" office:value-type="string"><text:p text:style-name="P9"/></table:table-cell><table:table-cell table:style-name="Tabla1.A3" office:value-type="string"><text:p text:style-name="P9">$560.000 </text:p></table:table-cell></table:table-row></table:table></draw:text-box></draw:frame></text:p>
      <text:h text:style-name="PSI_20_-_20_Título_20_1"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imbus Roman No9 L" svg:font-family="'Nimbus Roman No9 L'" style:font-family-generic="roman" style:font-pitch="variable"/>
    <style:font-face style:name="OpenSymbol" svg:font-family="OpenSymbol" style:font-charset="x-symbol"/>
    <style:font-face style:name="StarSymbol" svg:font-family="StarSymbol"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top="0.353cm" fo:margin-bottom="0cm" style: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left="1.27cm" fo:margin-top="0cm" fo:margin-bottom="0.212cm" style: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loext:char-complex-color loext:theme-type="accent1" loext:color-type="theme"/>
      </style:text-properties>
    </style:style>
    <style:style style:name="PSI_20_-_20_Comentario" style:display-name="PSI - Comentario" style:family="paragraph" style:parent-style-name="Standard" style:auto-update="true">
      <style:paragraph-properties fo:margin-left="0.203cm" fo:text-align="justify" style:justify-single-word="false" fo:text-indent="-0.011cm" style:auto-text-indent="false">
        <style:tab-stops>
          <style:tab-stop style:position="0cm"/>
        </style:tab-stops>
      </style:paragraph-properties>
      <style:text-properties fo:color="#548dd4" loext:opacity="100%" fo:language="es" fo:country="AR" fo:font-style="italic" style:font-style-asian="italic"/>
    </style:style>
    <style:style style:name="PSI_20_-_20_Comentario_20_en_20_Tabla" style:display-name="PSI - Comentario en Tabla" style:family="paragraph" style:parent-style-name="PSI_20_-_20_Comentario" style:auto-update="true"/>
    <style:style style:name="PSI_20_-_20_Descripción_20_del_20_Documentos" style:display-name="PSI - Descripción del Documentos" style:family="paragraph" style:parent-style-name="Standard" style:auto-update="true">
      <loext:graphic-properties draw:fill="solid" draw:fill-color="#ffffff"/>
      <style:paragraph-properties fo:margin-left="0cm" fo:text-align="justify" style:justify-single-word="false" fo:text-indent="0cm" style:auto-text-indent="false" fo:background-color="#ffffff"/>
      <style:text-properties fo:color="#548dd4" loext:opacity="100%" fo:language="es" fo:country="AR" fo:font-style="italic" style:font-style-asian="italic" style:font-size-complex="10.5pt"/>
    </style:style>
    <style:style style:name="PSI_20_-_20_Título_20_1" style:display-name="PSI - Título 1" style:family="paragraph" style:parent-style-name="Heading_20_1" style:auto-update="true">
      <style:paragraph-properties fo:margin-left="0cm" fo:margin-top="0.212cm" fo:margin-bottom="0.106cm" style:contextual-spacing="false" style:line-height-at-least="0.423cm" fo:keep-together="auto" fo:orphans="0" fo:widows="0" fo:hyphenation-ladder-count="no-limit" fo:text-indent="0cm" style:auto-text-indent="false">
        <style:tab-stops>
          <style:tab-stop style:position="0cm"/>
        </style:tab-stops>
      </style:paragraph-properties>
      <style:text-properties fo:language="es" fo:country="AR" fo:hyphenate="false" fo:hyphenation-remain-char-count="2" fo:hyphenation-push-char-count="2" loext:hyphenation-no-caps="false" loext:hyphenation-no-last-word="false" loext:hyphenation-word-char-count="5" loext:hyphenation-zone="no-limit"/>
    </style:style>
    <style:style style:name="PSI_20_-_20_Comentario_20__2b__20_Viñeta" style:display-name="PSI - Comentario + Viñeta" style:family="paragraph" style:parent-style-name="PSI_20_-_20_Comentario" style:auto-update="true" style:list-style-name="WWNum10">
      <style:paragraph-properties fo:margin-top="0cm" fo:margin-bottom="0cm" style:contextual-spacing="false" fo:line-height="150%"/>
    </style:style>
    <style:style style:name="PSI_20_-_20_Título_20_2" style:display-name="PSI - Título 2" style:family="paragraph" style:parent-style-name="Heading_20_2">
      <style:text-properties fo:language="es" fo:country="AR"/>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paragraph-properties fo:margin-left="0cm" fo:margin-top="0cm" fo:margin-bottom="0.353cm" style:contextual-spacing="false" fo:line-height="115%" fo:text-align="start" style:justify-single-word="false" fo:orphans="2" fo:widows="2" fo:text-indent="0cm" style:auto-text-indent="false" style:writing-mode="lr-tb"/>
      <style:text-properties fo:language="en" fo:country="US" style:font-name-asian="Calibri1" style:font-family-asian="Calibri" style:font-family-generic-asian="system" style:font-pitch-asian="variabl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loext:linked-style-name="Sin_20_espaciado_20_Car">
      <style:paragraph-properties fo:margin-left="0cm" fo:margin-top="0cm" fo:margin-bottom="0cm" style: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class="index">
      <style:paragraph-properties fo:margin-left="0cm" fo:margin-top="0.423cm" fo:margin-bottom="0.212cm" style:contextual-spacing="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text-indent="0cm" style:auto-text-indent="false"/>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ab-stops>
          <style:tab-stop style:position="15.002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top="0cm" fo:margin-bottom="0cm" style: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fo:language="es" fo:country="VE"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loext:hyphenation-no-caps="false" loext:hyphenation-no-last-word="false" loext:hyphenation-word-char-count="5" loext:hyphenation-zone="no-limit"/>
    </style:style>
    <style:style style:name="MNormal" style:family="paragraph" style:parent-style-name="Standard">
      <style:paragraph-properties fo:margin-left="0cm" fo:margin-top="0cm" fo:margin-bottom="0.106cm" style: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2"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fo:font-size="10pt" style:font-size-asian="10pt" style:font-size-complex="10pt"/>
    </style:style>
    <style:style style:name="PSI_20_-_20_Título_20_3" style:display-name="PSI - Título 3" style:family="paragraph" style:parent-style-name="Heading_20_3" style:auto-update="true"/>
    <style:style style:name="PSI_20_-_20_Título_20_4" style:display-name="PSI - Título 4" style:family="paragraph" style:parent-style-name="Heading_20_4" style:auto-update="true"/>
    <style:style style:name="Title" style:family="paragraph" style:parent-style-name="Standard" style:next-style-name="Standard" loext:linked-style-name="Título_20_C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PSI_20_-_20_Título" style:display-name="PSI - Título" style:family="paragraph" style:parent-style-name="Title" style:auto-update="true"/>
    <style:style style:name="PSI_20_-_20_Normal" style:display-name="PSI - Normal" style:family="paragraph" style:parent-style-name="Standard" style:auto-update="true">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auto-update="true" style:list-style-name="WWNum12"/>
    <style:style style:name="Frame_20_contents" style:display-name="Frame contents" style:family="paragraph" style:parent-style-name="Standard" style:class="extra"/>
    <style:style style:name="Default_20_Paragraph_20_Font" style:display-name="Default Paragraph Font" style:family="text"/>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loext:char-complex-color loext:theme-type="accent1" loext:color-type="theme"/>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loext:char-complex-color loext:theme-type="accent1" loext:color-type="theme"/>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Placeholder_20_Text" style:display-name="Placeholder Text" style:family="text" style:parent-style-name="Default_20_Paragraph_20_Font">
      <style:text-properties fo:color="#808080" loext:opacity="10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loext:char-complex-color loext:theme-type="accent1" loext:color-type="theme"/>
      </style:text-properties>
    </style:style>
    <style:style style:name="Título_20_Car" style:display-name="Título Car"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9pt" style:font-size-asian="9pt" style:font-name-complex="StarSymbol" style:font-family-complex="StarSymbol" style:font-family-generic-complex="system" style:font-pitch-complex="variable" style:font-size-complex="9pt"/>
    </style:style>
    <style:style style:name="ListLabel_20_38" style:display-name="ListLabel 38" style:family="text">
      <style:text-properties fo:font-size="9pt" style:font-size-asian="9pt" style:font-name-complex="StarSymbol" style:font-family-complex="StarSymbol" style:font-family-generic-complex="system" style:font-pitch-complex="variable" style:font-size-complex="9pt"/>
    </style:style>
    <style:style style:name="ListLabel_20_39" style:display-name="ListLabel 39" style:family="text">
      <style:text-properties fo:font-size="9pt" style:font-size-asian="9pt" style:font-name-complex="StarSymbol" style:font-family-complex="StarSymbol" style:font-family-generic-complex="system" style:font-pitch-complex="variable" style:font-size-complex="9pt"/>
    </style:style>
    <style:style style:name="ListLabel_20_40" style:display-name="ListLabel 40" style:family="text">
      <style:text-properties fo:font-size="9pt" style:font-size-asian="9pt" style:font-name-complex="StarSymbol" style:font-family-complex="StarSymbol" style:font-family-generic-complex="system" style:font-pitch-complex="variable" style:font-size-complex="9pt"/>
    </style:style>
    <style:style style:name="ListLabel_20_41" style:display-name="ListLabel 41" style:family="text">
      <style:text-properties fo:font-size="9pt" style:font-size-asian="9pt" style:font-name-complex="StarSymbol" style:font-family-complex="StarSymbol" style:font-family-generic-complex="system" style:font-pitch-complex="variable" style:font-size-complex="9pt"/>
    </style:style>
    <style:style style:name="ListLabel_20_42" style:display-name="ListLabel 42" style:family="text">
      <style:text-properties fo:font-size="9pt" style:font-size-asian="9pt" style:font-name-complex="StarSymbol" style:font-family-complex="StarSymbol" style:font-family-generic-complex="system" style:font-pitch-complex="variable" style:font-size-complex="9pt"/>
    </style:style>
    <style:style style:name="ListLabel_20_43" style:display-name="ListLabel 43" style:family="text">
      <style:text-properties fo:font-size="9pt" style:font-size-asian="9pt" style:font-name-complex="StarSymbol" style:font-family-complex="StarSymbol" style:font-family-generic-complex="system" style:font-pitch-complex="variable" style:font-size-complex="9pt"/>
    </style:style>
    <style:style style:name="ListLabel_20_44" style:display-name="ListLabel 44" style:family="text">
      <style:text-properties fo:font-size="9pt" style:font-size-asian="9pt" style:font-name-complex="StarSymbol" style:font-family-complex="StarSymbol" style:font-family-generic-complex="system" style:font-pitch-complex="variable" style:font-size-complex="9pt"/>
    </style:style>
    <style:style style:name="ListLabel_20_45" style:display-name="ListLabel 45" style:family="text">
      <style:text-properties fo:font-size="9pt" style:font-size-asian="9pt" style:font-name-complex="StarSymbol" style:font-family-complex="StarSymbol" style:font-family-generic-complex="system" style:font-pitch-complex="variable" style:font-size-complex="9pt"/>
    </style:style>
    <style:style style:name="ListLabel_20_46" style:display-name="ListLabel 46" style:family="text">
      <style:text-properties fo:font-size="9pt" style:font-size-asian="9pt" style:font-name-complex="StarSymbol" style:font-family-complex="StarSymbol" style:font-family-generic-complex="system" style:font-pitch-complex="variable" style:font-size-complex="9pt"/>
    </style:style>
    <style:style style:name="ListLabel_20_47" style:display-name="ListLabel 47" style:family="text">
      <style:text-properties fo:font-size="9pt" style:font-size-asian="9pt" style:font-name-complex="StarSymbol" style:font-family-complex="StarSymbol" style:font-family-generic-complex="system" style:font-pitch-complex="variable" style:font-size-complex="9pt"/>
    </style:style>
    <style:style style:name="ListLabel_20_48" style:display-name="ListLabel 48" style:family="text">
      <style:text-properties fo:font-size="9pt" style:font-size-asian="9pt" style:font-name-complex="StarSymbol" style:font-family-complex="StarSymbol" style:font-family-generic-complex="system" style:font-pitch-complex="variable" style:font-size-complex="9pt"/>
    </style:style>
    <style:style style:name="ListLabel_20_49" style:display-name="ListLabel 49" style:family="text">
      <style:text-properties fo:font-size="9pt" style:font-size-asian="9pt" style:font-name-complex="StarSymbol" style:font-family-complex="StarSymbol" style:font-family-generic-complex="system" style:font-pitch-complex="variable" style:font-size-complex="9pt"/>
    </style:style>
    <style:style style:name="ListLabel_20_50" style:display-name="ListLabel 50" style:family="text">
      <style:text-properties fo:font-size="9pt" style:font-size-asian="9pt" style:font-name-complex="StarSymbol" style:font-family-complex="StarSymbol" style:font-family-generic-complex="system" style:font-pitch-complex="variable" style:font-size-complex="9pt"/>
    </style:style>
    <style:style style:name="ListLabel_20_51" style:display-name="ListLabel 51" style:family="text">
      <style:text-properties fo:font-size="9pt" style:font-size-asian="9pt" style:font-name-complex="StarSymbol" style:font-family-complex="StarSymbol" style:font-family-generic-complex="system" style:font-pitch-complex="variable" style:font-size-complex="9pt"/>
    </style:style>
    <style:style style:name="ListLabel_20_52" style:display-name="ListLabel 52" style:family="text">
      <style:text-properties fo:font-size="9pt" style:font-size-asian="9pt" style:font-name-complex="StarSymbol" style:font-family-complex="StarSymbol" style:font-family-generic-complex="system" style:font-pitch-complex="variable" style:font-size-complex="9pt"/>
    </style:style>
    <style:style style:name="ListLabel_20_53" style:display-name="ListLabel 53" style:family="text">
      <style:text-properties fo:font-size="9pt" style:font-size-asian="9pt" style:font-name-complex="StarSymbol" style:font-family-complex="StarSymbol" style:font-family-generic-complex="system" style:font-pitch-complex="variable" style:font-size-complex="9pt"/>
    </style:style>
    <style:style style:name="ListLabel_20_54" style:display-name="ListLabel 54" style:family="text">
      <style:text-properties fo:font-size="9pt" style:font-size-asian="9pt" style:font-name-complex="StarSymbol" style:font-family-complex="StarSymbol" style:font-family-generic-complex="system" style:font-pitch-complex="variable" style:font-size-complex="9pt"/>
    </style:style>
    <style:style style:name="ListLabel_20_55" style:display-name="ListLabel 55" style:family="text">
      <style:text-properties fo:font-size="9pt" style:font-size-asian="9pt" style:font-name-complex="StarSymbol" style:font-family-complex="StarSymbol" style:font-family-generic-complex="system" style:font-pitch-complex="variable" style:font-size-complex="9pt"/>
    </style:style>
    <style:style style:name="ListLabel_20_56" style:display-name="ListLabel 56" style:family="text">
      <style:text-properties fo:font-size="9pt" style:font-size-asian="9pt" style:font-name-complex="StarSymbol" style:font-family-complex="StarSymbol" style:font-family-generic-complex="system" style:font-pitch-complex="variable" style:font-size-complex="9pt"/>
    </style:style>
    <style:style style:name="ListLabel_20_57" style:display-name="ListLabel 57" style:family="text">
      <style:text-properties fo:font-size="9pt" style:font-size-asian="9pt" style:font-name-complex="StarSymbol" style:font-family-complex="StarSymbol" style:font-family-generic-complex="system" style:font-pitch-complex="variable" style:font-size-complex="9pt"/>
    </style:style>
    <style:style style:name="ListLabel_20_58" style:display-name="ListLabel 58" style:family="text">
      <style:text-properties fo:font-size="9pt" style:font-size-asian="9pt" style:font-name-complex="StarSymbol" style:font-family-complex="StarSymbol" style:font-family-generic-complex="system" style:font-pitch-complex="variable" style:font-size-complex="9pt"/>
    </style:style>
    <style:style style:name="ListLabel_20_59" style:display-name="ListLabel 59" style:family="text">
      <style:text-properties fo:font-size="9pt" style:font-size-asian="9pt" style:font-name-complex="StarSymbol" style:font-family-complex="StarSymbol" style:font-family-generic-complex="system" style:font-pitch-complex="variable" style:font-size-complex="9pt"/>
    </style:style>
    <style:style style:name="ListLabel_20_60" style:display-name="ListLabel 60" style:family="text">
      <style:text-properties fo:font-size="9pt" style:font-size-asian="9pt" style:font-name-complex="StarSymbol" style:font-family-complex="StarSymbol" style:font-family-generic-complex="system" style:font-pitch-complex="variable" style:font-size-complex="9pt"/>
    </style:style>
    <style:style style:name="ListLabel_20_61" style:display-name="ListLabel 61" style:family="text">
      <style:text-properties fo:font-size="9pt" style:font-size-asian="9pt" style:font-name-complex="StarSymbol" style:font-family-complex="StarSymbol" style:font-family-generic-complex="system" style:font-pitch-complex="variable" style:font-size-complex="9pt"/>
    </style:style>
    <style:style style:name="ListLabel_20_62" style:display-name="ListLabel 62" style:family="text">
      <style:text-properties fo:font-size="9pt" style:font-size-asian="9pt" style:font-name-complex="StarSymbol" style:font-family-complex="StarSymbol" style:font-family-generic-complex="system" style:font-pitch-complex="variable" style:font-size-complex="9pt"/>
    </style:style>
    <style:style style:name="ListLabel_20_63" style:display-name="ListLabel 63" style:family="text">
      <style:text-properties fo:font-size="9pt" style:font-size-asian="9pt" style:font-name-complex="StarSymbol" style:font-family-complex="StarSymbol" style:font-family-generic-complex="system" style:font-pitch-complex="variable" style:font-size-complex="9pt"/>
    </style:style>
    <style:style style:name="ListLabel_20_64" style:display-name="ListLabel 64" style:family="text">
      <style:text-properties fo:font-size="9pt" style:font-size-asian="9pt" style:font-name-complex="StarSymbol" style:font-family-complex="StarSymbol" style:font-family-generic-complex="system" style:font-pitch-complex="variable" style:font-size-complex="9pt"/>
    </style:style>
    <style:style style:name="ListLabel_20_65" style:display-name="ListLabel 65" style:family="text">
      <style:text-properties fo:font-size="9pt" style:font-size-asian="9pt" style:font-name-complex="StarSymbol" style:font-family-complex="StarSymbol" style:font-family-generic-complex="system" style:font-pitch-complex="variable" style:font-size-complex="9pt"/>
    </style:style>
    <style:style style:name="ListLabel_20_66" style:display-name="ListLabel 66" style:family="text">
      <style:text-properties fo:font-size="9pt" style:font-size-asian="9pt" style:font-name-complex="StarSymbol" style:font-family-complex="StarSymbol" style:font-family-generic-complex="system" style:font-pitch-complex="variable" style:font-size-complex="9pt"/>
    </style:style>
    <style:style style:name="ListLabel_20_67" style:display-name="ListLabel 67" style:family="text">
      <style:text-properties fo:font-size="9pt" style:font-size-asian="9pt" style:font-name-complex="StarSymbol" style:font-family-complex="StarSymbol" style:font-family-generic-complex="system" style:font-pitch-complex="variable" style:font-size-complex="9pt"/>
    </style:style>
    <style:style style:name="ListLabel_20_68" style:display-name="ListLabel 68" style:family="text">
      <style:text-properties fo:font-size="9pt" style:font-size-asian="9pt" style:font-name-complex="StarSymbol" style:font-family-complex="StarSymbol" style:font-family-generic-complex="system" style:font-pitch-complex="variable" style:font-size-complex="9pt"/>
    </style:style>
    <style:style style:name="ListLabel_20_69" style:display-name="ListLabel 69" style:family="text">
      <style:text-properties fo:font-size="9pt" style:font-size-asian="9pt" style:font-name-complex="StarSymbol" style:font-family-complex="StarSymbol" style:font-family-generic-complex="system" style:font-pitch-complex="variable" style:font-size-complex="9pt"/>
    </style:style>
    <style:style style:name="ListLabel_20_70" style:display-name="ListLabel 70" style:family="text">
      <style:text-properties fo:font-size="9pt" style:font-size-asian="9pt" style:font-name-complex="StarSymbol" style:font-family-complex="StarSymbol" style:font-family-generic-complex="system" style:font-pitch-complex="variable" style:font-size-complex="9pt"/>
    </style:style>
    <style:style style:name="ListLabel_20_71" style:display-name="ListLabel 71" style:family="text">
      <style:text-properties fo:font-size="9pt" style:font-size-asian="9pt" style:font-name-complex="StarSymbol" style:font-family-complex="StarSymbol" style:font-family-generic-complex="system" style:font-pitch-complex="variable" style:font-size-complex="9pt"/>
    </style:style>
    <style:style style:name="ListLabel_20_72" style:display-name="ListLabel 72" style:family="text">
      <style:text-properties fo:font-size="9pt" style:font-size-asian="9pt" style:font-name-complex="StarSymbol" style:font-family-complex="StarSymbol" style:font-family-generic-complex="system" style:font-pitch-complex="variable" style:font-size-complex="9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ListLabel_20_7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61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71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81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732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542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352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61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71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81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margin-left="0cm" fo:text-indent="0cm" style:auto-text-indent="false">
        <style:tab-stops>
          <style:tab-stop style:position="13.653cm"/>
        </style:tab-stops>
      </style:paragraph-properties>
    </style:style>
    <style:style style:name="MP2" style:family="paragraph">
      <loext:graphic-properties draw:fill="solid" draw:fill-color="#4bacc6"/>
      <style:paragraph-properties fo:text-align="center"/>
    </style:style>
    <style:style style:name="MP3" style:family="paragraph">
      <loext:graphic-properties draw:fill="none"/>
      <style:text-properties fo:font-size="11pt"/>
    </style:style>
    <style:style style:name="MP4" style:family="paragraph">
      <loext:graphic-properties draw:fill="none"/>
      <style:paragraph-properties fo:text-align="center"/>
      <style:text-properties fo:font-size="11pt"/>
    </style:style>
    <style:style style:name="MP5" style:family="paragraph" style:parent-style-name="Standard">
      <style:paragraph-properties>
        <style:tab-stops>
          <style:tab-stop style:position="7.5cm" style:type="center"/>
        </style:tab-stops>
      </style:paragraph-properties>
    </style:style>
    <style:style style:name="MP6" style:family="paragraph" style:parent-style-name="Standard">
      <style:paragraph-properties fo:margin-top="0cm" fo:margin-bottom="0cm" style:contextual-spacing="false">
        <style:tab-stops>
          <style:tab-stop style:position="7.5cm" style:type="center"/>
        </style:tab-stops>
      </style:paragraph-properties>
      <style:text-properties fo:language="es" fo:country="AR" officeooo:rsid="0009cd4d" officeooo:paragraph-rsid="0009cd4d"/>
    </style:style>
    <style:style style:name="MT1" style:family="text">
      <style:text-properties style:font-name="Cambria"/>
    </style:style>
    <style:style style:name="MT2" style:family="text">
      <style:text-properties style:font-name="Cambria" fo:language="es" fo:country="AR"/>
    </style:style>
    <style:style style:name="MT3" style:family="text">
      <style:text-properties style:font-name="Cambria" style:font-size-complex="18pt"/>
    </style:style>
    <style:style style:name="MT4" style:family="text">
      <style:text-properties style:font-name="Cambria" officeooo:rsid="0009cd4d" style:font-size-complex="18pt"/>
    </style:style>
    <style:style style:name="MT5" style:family="text">
      <style:text-properties fo:language="es" fo:country="AR" officeooo:rsid="0009cd4d"/>
    </style:style>
    <style:style style:name="MT6" style:family="text">
      <style:text-properties style:font-name="Cambria" style:font-name-complex="Cambria1"/>
    </style:style>
    <style:style style:name="Mgr1" style:family="graphic">
      <style:graphic-properties draw:stroke="solid" svg:stroke-width="0cm" svg:stroke-color="#205867" draw:stroke-linejoin="round" svg:stroke-linecap="butt" draw:fill="solid" draw:fill-color="#4bacc6" draw:textarea-horizontal-align="center" draw:textarea-vertical-align="top" draw:auto-grow-height="false" loext:decorative="false" fo:margin-left="0.318cm" fo:margin-right="0.318cm" fo:margin-top="0cm" fo:margin-bottom="0cm" style:run-through="background" style:wrap="run-through" style:number-wrapped-paragraphs="no-limit" style:vertical-pos="from-top" style:vertical-rel="page" style:horizontal-pos="from-left" style:horizontal-rel="page-start-margin" draw:wrap-influence-on-position="once-concurrent" loext:allow-overlap="true" style:flow-with-text="false"/>
    </style:style>
    <style:style style:name="Mgr2" style:family="graphic">
      <style:graphic-properties style:writing-mode="lr-tb" loext:decorative="false" fo:margin-left="0.318cm" fo:margin-right="0.318cm" fo:margin-top="0cm" fo:margin-bottom="0cm" style:run-through="background" style:wrap="run-through" style:number-wrapped-paragraphs="no-limit" style:vertical-pos="top" style:vertical-rel="page" style:horizontal-pos="center" style:horizontal-rel="page" draw:wrap-influence-on-position="once-concurrent" loext:allow-overlap="true" style:flow-with-text="false"/>
    </style:style>
    <style:style style:name="Mgr3" style:family="graphic">
      <style:graphic-properties draw:stroke="solid" svg:stroke-width="0cm" svg:stroke-color="#31849b" draw:stroke-linejoin="round" svg:stroke-linecap="butt" draw:fill="none" loext:fill-use-slide-background="false" draw:textarea-vertical-align="top" draw:auto-grow-height="false" fo:min-height="0.002cm" fo:min-width="20.971cm" loext:decorative="false" style:run-through="background"/>
    </style:style>
    <style:style style:name="Mgr4" style:family="graphic">
      <style:graphic-properties draw:stroke="none" svg:stroke-width="0cm" draw:fill="none" loext:fill-use-slide-background="false" draw:textarea-horizontal-align="center" draw:textarea-vertical-align="top" draw:auto-grow-height="false" loext:decorative="false" style:run-through="background"/>
    </style:style>
    <style:style style:name="Mgr5" style:family="graphic">
      <style:graphic-properties draw:stroke="solid" svg:stroke-width="0cm" svg:stroke-color="#205867" draw:stroke-linejoin="round" svg:stroke-linecap="butt" draw:fill="solid" draw:fill-color="#4bacc6" draw:textarea-horizontal-align="center" draw:textarea-vertical-align="top" draw:auto-grow-height="false" loext:decorative="false" fo:margin-left="0.318cm" fo:margin-right="0.318cm" fo:margin-top="0cm" fo:margin-bottom="0cm" style:run-through="background" style:wrap="run-through" style:number-wrapped-paragraphs="no-limit" style:vertical-pos="bottom" style:vertical-rel="page" style:horizontal-pos="center" style:horizontal-rel="page-start-margin" draw:wrap-influence-on-position="once-concurrent" loext:allow-overlap="true" style:flow-with-text="false"/>
    </style:style>
    <style:style style:name="Mgr6" style:family="graphic">
      <style:graphic-properties style:writing-mode="lr-tb" loext:decorative="false"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loext:allow-overlap="true" style:flow-with-text="false"/>
    </style:style>
    <style:style style:name="Mgr7" style:family="graphic">
      <style:graphic-properties draw:stroke="solid" svg:stroke-width="0cm" svg:stroke-color="#31849b" draw:stroke-linejoin="round" svg:stroke-linecap="butt" draw:fill="none" loext:fill-use-slide-background="false" draw:textarea-vertical-align="top" draw:auto-grow-height="false" fo:min-height="0.002cm" fo:min-width="21.558cm" loext:decorative="false" style:run-through="background"/>
    </style:style>
    <style:style style:name="Mgr8" style:family="graphic">
      <style:graphic-properties draw:stroke="solid" svg:stroke-width="0cm" svg:stroke-color="#205867" draw:stroke-linejoin="round" svg:stroke-linecap="butt" draw:fill="solid" draw:fill-color="#4bacc6" draw:textarea-horizontal-align="center" draw:textarea-vertical-align="top" draw:auto-grow-height="false" loext:decorative="false" fo:margin-left="0.318cm" fo:margin-right="0.318cm" fo:margin-top="0cm" fo:margin-bottom="0cm" style:run-through="background" style:wrap="run-through" style:number-wrapped-paragraphs="no-limit" style:vertical-pos="bottom" style:vertical-rel="page" style:horizontal-pos="center" style:horizontal-rel="page-end-margin" draw:wrap-influence-on-position="once-concurrent" loext:allow-overlap="true" style:flow-with-text="false"/>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loext:content-control loext:plain-text="true" loext:alias="Título" loext:id="11545881"><text:span text:style-name="MT2">Estudio de Factibilidad</text:span></loext:content-control></text:p>
        <text:p text:style-name="MP1" loext:marker-style-name="MT3"><draw:rect text:anchor-type="char" draw:z-index="39" draw:name="Forma1" draw:style-name="Mgr1" draw:text-style-name="MP2" svg:width="0.253cm" svg:height="2.22cm" svg:x="1.372cm" svg:y="0cm"><text:p/></draw:rect><draw:rect text:anchor-type="char" draw:z-index="29" draw:name="Forma2" draw:style-name="Mgr1" draw:text-style-name="MP2" svg:width="0.253cm" svg:height="2.222cm" svg:x="19.375cm" svg:y="0cm"><text:p/></draw:rect><draw:g text:anchor-type="char" draw:z-index="49" draw:name="Forma3" draw:style-name="Mgr2"><draw:custom-shape draw:style-name="Mgr3" draw:text-style-name="MP3" svg:width="20.972cm" svg:height="0.003cm" svg:x="0.014cm" svg:y="2.238cm"><text:p/><draw:enhanced-geometry svg:viewBox="0 0 21600 21600" draw:type="mso-spt32" draw:enhanced-path="M 0 0 L 21600 21600 N"/></draw:custom-shape><draw:rect draw:style-name="Mgr4" draw:text-style-name="MP4" svg:width="5.344cm" svg:height="2.266cm" svg:x="0.014cm" svg:y="0cm"><text:p/></draw:rect></draw:g><loext:content-control loext:plain-text="true" loext:alias="Subtítulo" loext:id="11545882"><text:span text:style-name="MT4">&lt;Divise&gt;</text:span></loext:content-control><text:span text:style-name="MT3"><text:tab/></text:span></text:p>
      </style:header>
      <style:header-first>
        <text:p text:style-name="Header"/>
      </style:header-first>
      <style:footer>
        <text:p text:style-name="MP5"><loext:content-control loext:plain-text="true" loext:alias="Compañía" loext:id="3709535"><text:span text:style-name="MT5">Grupo 6 - Divise</text:span><draw:rect text:anchor-type="char" draw:z-index="19" draw:name="Forma4" draw:style-name="Mgr5" draw:text-style-name="MP2" svg:width="0.253cm" svg:height="2.257cm" svg:x="1.372cm" svg:y="27.443cm"><text:p/></draw:rect><draw:g text:anchor-type="char" draw:z-index="59" draw:name="Forma5" draw:style-name="Mgr6"><draw:custom-shape draw:style-name="Mgr7" draw:text-style-name="MP3" svg:width="21.559cm" svg:height="0.003cm" svg:x="-0.279cm" svg:y="29.672cm"><text:p/><draw:enhanced-geometry svg:viewBox="0 0 21600 21600" draw:type="mso-spt32" draw:enhanced-path="M 0 0 L 21600 21600 N"/></draw:custom-shape><draw:rect draw:style-name="Mgr4" draw:text-style-name="MP4" svg:width="5.494cm" svg:height="2.285cm" svg:x="-0.279cm" svg:y="27.414cm"><text:p/></draw:rect></draw:g></loext:content-control><text:tab/><text:tab/><text:tab/><text:span text:style-name="MT6">Página </text:span><text:span text:style-name="MT6"><text:page-number text:select-page="current">11</text:page-number></text:span><text:span text:style-name="MT6"><text:s/>de </text:span><text:span text:style-name="MT6"><text:page-count>11</text:page-count></text:span><draw:rect text:anchor-type="char" draw:z-index="9" draw:name="Forma6" draw:style-name="Mgr8" draw:text-style-name="MP2" svg:width="0.253cm" svg:height="2.257cm" svg:x="1.372cm" svg:y="27.443cm"><text:p/></draw:rect></text:p>
        <text:p text:style-name="MP6">Valentin Lopez</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Estudio de Factibilidad</dc:title>
    <dc:subject>&lt;Nombre del Proyecto&gt;</dc:subject>
    <meta:editing-cycles>21</meta:editing-cycles>
    <meta:creation-date>2026-05-02T14:02:32.705000000</meta:creation-date>
    <dc:date>2026-05-03T14:07:49.542000000</dc:date>
    <meta:editing-duration>PT1H6M39S</meta:editing-duration>
    <meta:generator>LibreOffice/24.2.4.2$Windows_X86_64 LibreOffice_project/51a6219feb6075d9a4c46691dcfe0cd9c4fff3c2</meta:generator>
    <meta:document-statistic meta:table-count="1" meta:image-count="0" meta:object-count="0" meta:page-count="11" meta:paragraph-count="180" meta:word-count="1754" meta:character-count="11639" meta:non-whitespace-character-count="9994"/>
    <meta:user-defined meta:name="AppVersion">12.0000</meta:user-defined>
    <meta:user-defined meta:name="Company">Nombre del Grupo de Desarrollo o Asignatura   </meta:user-defined>
    <meta:template xlink:type="simple" xlink:actuate="onRequest" xlink:title="Plantilla Estudio de Factibilidad.dotx" xlink:href=""/>
  </office:meta>
</office:document-meta>
</file>